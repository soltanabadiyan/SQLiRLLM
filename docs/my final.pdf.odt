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5000000291D879F7A.png" manifest:media-type="image/png"/>
  <manifest:file-entry manifest:full-path="Pictures/100000010000070500000051951C7E95.png" manifest:media-type="image/png"/>
  <manifest:file-entry manifest:full-path="Pictures/10000000000001F0000000EDE213842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Sans Serif" svg:font-family="'Microsoft Sans Serif'" style:font-family-generic="swiss"/>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1" style:list-style-name="WWNum2">
      <style:paragraph-properties fo:margin-left="0.2925in" fo:margin-right="0in" fo:margin-top="0.0898in" fo:margin-bottom="0in" style:contextual-spacing="false" fo:line-height="100%" fo:text-align="justify" style:justify-single-word="false" fo:text-indent="-0.1543in" style:auto-text-indent="false">
        <style:tab-stops>
          <style:tab-stop style:position="0.2925in"/>
        </style:tab-stops>
      </style:paragraph-properties>
    </style:style>
    <style:style style:name="P2" style:family="paragraph" style:parent-style-name="Heading_20_1" style:list-style-name="WWNum2">
      <style:paragraph-properties fo:margin-left="0.3in" fo:margin-right="0in" fo:margin-top="0in" fo:margin-bottom="0in" style:contextual-spacing="false" fo:line-height="100%" fo:text-align="justify" style:justify-single-word="false" fo:text-indent="-0.1618in" style:auto-text-indent="false">
        <style:tab-stops>
          <style:tab-stop style:position="0.3in"/>
        </style:tab-stops>
      </style:paragraph-properties>
    </style:style>
    <style:style style:name="P3" style:family="paragraph" style:parent-style-name="Heading_20_1" style:list-style-name="WWNum3">
      <style:paragraph-properties fo:margin-left="0.2925in" fo:margin-right="0in" fo:margin-top="0.0839in" fo:margin-bottom="0in" style:contextual-spacing="false" fo:line-height="100%" fo:text-align="start" style:justify-single-word="false" fo:text-indent="-0.1543in" style:auto-text-indent="false">
        <style:tab-stops>
          <style:tab-stop style:position="0.2925in"/>
        </style:tab-stops>
      </style:paragraph-properties>
    </style:style>
    <style:style style:name="P4" style:family="paragraph" style:parent-style-name="Heading_20_1" style:list-style-name="WWNum3">
      <style:paragraph-properties fo:margin-left="0.2925in" fo:margin-right="0in" fo:margin-top="0in" fo:margin-bottom="0in" style:contextual-spacing="false" fo:line-height="100%" fo:text-align="start" style:justify-single-word="false" fo:text-indent="-0.1543in" style:auto-text-indent="false">
        <style:tab-stops>
          <style:tab-stop style:position="0.2925in"/>
        </style:tab-stops>
      </style:paragraph-properties>
    </style:style>
    <style:style style:name="P5" style:family="paragraph" style:parent-style-name="Heading_20_1" style:list-style-name="WWNum3">
      <style:paragraph-properties fo:margin-left="0.3in" fo:margin-right="0in" fo:margin-top="0in" fo:margin-bottom="0in" style:contextual-spacing="false" fo:line-height="100%" fo:text-align="start" style:justify-single-word="false" fo:text-indent="-0.1618in" style:auto-text-indent="false">
        <style:tab-stops>
          <style:tab-stop style:position="0.3in"/>
        </style:tab-stops>
      </style:paragraph-properties>
    </style:style>
    <style:style style:name="P6" style:family="paragraph" style:parent-style-name="Heading_20_1" style:list-style-name="WWNum3">
      <style:paragraph-properties fo:margin-left="0.3083in" fo:margin-right="0in" fo:margin-top="0in" fo:margin-bottom="0in" style:contextual-spacing="false" fo:line-height="100%" fo:text-align="start" style:justify-single-word="false" fo:text-indent="-0.1701in" style:auto-text-indent="false">
        <style:tab-stops>
          <style:tab-stop style:position="0.3083in"/>
        </style:tab-stops>
      </style:paragraph-properties>
    </style:style>
    <style:style style:name="P7" style:family="paragraph" style:parent-style-name="List_20_Paragraph" style:list-style-name="WWNum1">
      <style:paragraph-properties fo:margin-left="0.2417in" fo:margin-right="0in" fo:margin-top="0in" fo:margin-bottom="0in" style:contextual-spacing="false" fo:line-height="100%" fo:text-align="center" style:justify-single-word="false" fo:text-indent="-0.189in" style:auto-text-indent="false">
        <style:tab-stops>
          <style:tab-stop style:position="0.2417in"/>
        </style:tab-stops>
      </style:paragraph-properties>
    </style:style>
    <style:style style:name="P8" style:family="paragraph" style:parent-style-name="List_20_Paragraph" style:list-style-name="WWNum2">
      <style:paragraph-properties fo:margin-left="0.2693in" fo:margin-right="0in" fo:margin-top="0.1035in" fo:margin-bottom="0in" style:contextual-spacing="false" fo:line-height="100%" fo:text-align="start" style:justify-single-word="false" fo:text-indent="-0.1311in" style:auto-text-indent="false">
        <style:tab-stops>
          <style:tab-stop style:position="0.2693in"/>
        </style:tab-stops>
      </style:paragraph-properties>
    </style:style>
    <style:style style:name="P9" style:family="paragraph" style:parent-style-name="List_20_Paragraph" style:list-style-name="WWNum2">
      <style:paragraph-properties fo:margin-left="0.2516in" fo:margin-right="0in" fo:margin-top="0.0799in" fo:margin-bottom="0in" style:contextual-spacing="false" fo:line-height="100%" fo:text-align="start" style:justify-single-word="false" fo:text-indent="-0.1134in" style:auto-text-indent="false">
        <style:tab-stops>
          <style:tab-stop style:position="0.2516in"/>
        </style:tab-stops>
      </style:paragraph-properties>
    </style:style>
    <style:style style:name="P10" style:family="paragraph" style:parent-style-name="List_20_Paragraph" style:list-style-name="WWNum4">
      <style:paragraph-properties fo:margin-left="0.2516in" fo:margin-right="0in" fo:margin-top="0.1134in" fo:margin-bottom="0in" style:contextual-spacing="false" fo:line-height="100%" fo:text-align="start" style:justify-single-word="false" fo:text-indent="-0.1134in" style:auto-text-indent="false">
        <style:tab-stops>
          <style:tab-stop style:position="0.2516in"/>
        </style:tab-stops>
      </style:paragraph-properties>
    </style:style>
    <style:style style:name="P11" style:family="paragraph" style:parent-style-name="List_20_Paragraph" style:list-style-name="WWNum1">
      <style:paragraph-properties fo:margin-left="1.3083in" fo:margin-right="0in" fo:margin-top="0in" fo:margin-bottom="0in" style:contextual-spacing="false" fo:line-height="100%" fo:text-align="start" style:justify-single-word="false" fo:text-indent="-0.161in" style:auto-text-indent="false">
        <style:tab-stops>
          <style:tab-stop style:position="1.3083in"/>
        </style:tab-stops>
      </style:paragraph-properties>
    </style:style>
    <style:style style:name="P12" style:family="paragraph" style:parent-style-name="List_20_Paragraph" style:list-style-name="WWNum1">
      <style:paragraph-properties fo:margin-left="1.3193in" fo:margin-right="0in" fo:margin-top="0in" fo:margin-bottom="0in" style:contextual-spacing="false" fo:line-height="100%" fo:text-align="start" style:justify-single-word="false" fo:text-indent="-0.2071in" style:auto-text-indent="false">
        <style:tab-stops>
          <style:tab-stop style:position="1.3193in"/>
        </style:tab-stops>
      </style:paragraph-properties>
    </style:style>
    <style:style style:name="P13" style:family="paragraph" style:parent-style-name="List_20_Paragraph" style:list-style-name="WWNum6">
      <style:paragraph-properties fo:margin-left="0.3839in" fo:margin-right="0.3654in" fo:margin-top="0.0638in" fo:margin-bottom="0in" style:contextual-spacing="false" fo:line-height="100%" fo:text-align="start" style:justify-single-word="false" fo:text-indent="-0.2465in" style:auto-text-indent="false">
        <style:tab-stops>
          <style:tab-stop style:position="0.2929in"/>
          <style:tab-stop style:position="0.3839in"/>
        </style:tab-stops>
      </style:paragraph-properties>
    </style:style>
    <style:style style:name="P14" style:family="paragraph" style:parent-style-name="List_20_Paragraph" style:list-style-name="WWNum2">
      <style:paragraph-properties fo:margin-left="0.1382in" fo:margin-right="0.6465in" fo:margin-top="0.002in" fo:margin-bottom="0in" style:contextual-spacing="false" fo:line-height="95%" fo:text-align="start" style:justify-single-word="false" fo:text-indent="0in" style:auto-text-indent="false">
        <style:tab-stops>
          <style:tab-stop style:position="0.2516in"/>
        </style:tab-stops>
      </style:paragraph-properties>
    </style:style>
    <style:style style:name="P15" style:family="paragraph" style:parent-style-name="List_20_Paragraph" style:list-style-name="WWNum2">
      <style:paragraph-properties fo:margin-left="0.1382in" fo:margin-right="0.2374in" fo:margin-top="0.002in" fo:margin-bottom="0in" style:contextual-spacing="false" fo:line-height="95%" fo:text-align="start" style:justify-single-word="false" fo:text-indent="0in" style:auto-text-indent="false">
        <style:tab-stops>
          <style:tab-stop style:position="0.2516in"/>
        </style:tab-stops>
      </style:paragraph-properties>
    </style:style>
    <style:style style:name="P16" style:family="paragraph" style:parent-style-name="List_20_Paragraph" style:list-style-name="WWNum2">
      <style:paragraph-properties fo:margin-left="0.1382in" fo:margin-right="0.2417in" fo:margin-top="0in" fo:margin-bottom="0in" style:contextual-spacing="false" fo:line-height="95%" fo:text-align="start" style:justify-single-word="false" fo:text-indent="0in" style:auto-text-indent="false">
        <style:tab-stops>
          <style:tab-stop style:position="0.2516in"/>
        </style:tab-stops>
      </style:paragraph-properties>
    </style:style>
    <style:style style:name="P17" style:family="paragraph" style:parent-style-name="List_20_Paragraph" style:list-style-name="WWNum4">
      <style:paragraph-properties fo:margin-left="0.1382in" fo:margin-right="0.3457in" fo:margin-top="0in" fo:margin-bottom="0in" style:contextual-spacing="false" fo:line-height="95%" fo:text-align="start" style:justify-single-word="false" fo:text-indent="0in" style:auto-text-indent="false">
        <style:tab-stops>
          <style:tab-stop style:position="0.2516in"/>
        </style:tab-stops>
      </style:paragraph-properties>
    </style:style>
    <style:style style:name="P18" style:family="paragraph" style:parent-style-name="List_20_Paragraph" style:list-style-name="WWNum2">
      <style:paragraph-properties fo:margin-left="0.2516in" fo:margin-right="0in" fo:margin-top="0in" fo:margin-bottom="0in" style:contextual-spacing="false" fo:line-height="0.1354in" fo:text-align="start" style:justify-single-word="false" fo:text-indent="-0.1134in" style:auto-text-indent="false">
        <style:tab-stops>
          <style:tab-stop style:position="0.2516in"/>
        </style:tab-stops>
      </style:paragraph-properties>
    </style:style>
    <style:style style:name="P19" style:family="paragraph" style:parent-style-name="List_20_Paragraph" style:list-style-name="WWNum2">
      <style:paragraph-properties fo:margin-left="0.1382in" fo:margin-right="0.6201in" fo:margin-top="0in" fo:margin-bottom="0in" style:contextual-spacing="false" fo:line-height="98%" fo:text-align="start" style:justify-single-word="false" fo:text-indent="0in" style:auto-text-indent="false">
        <style:tab-stops>
          <style:tab-stop style:position="0.2516in"/>
        </style:tab-stops>
      </style:paragraph-properties>
    </style:style>
    <style:style style:name="P20" style:family="paragraph" style:parent-style-name="List_20_Paragraph" style:list-style-name="WWNum2">
      <style:paragraph-properties fo:margin-left="0.1382in" fo:margin-right="0.4154in" fo:margin-top="0in" fo:margin-bottom="0in" style:contextual-spacing="false" fo:line-height="98%" fo:text-align="start" style:justify-single-word="false" fo:text-indent="0in" style:auto-text-indent="false">
        <style:tab-stops>
          <style:tab-stop style:position="0.2516in"/>
        </style:tab-stops>
      </style:paragraph-properties>
    </style:style>
    <style:style style:name="P21" style:family="paragraph" style:parent-style-name="List_20_Paragraph" style:list-style-name="WWNum6">
      <style:paragraph-properties fo:margin-left="0.1382in" fo:margin-right="0.4055in" fo:margin-top="0.061in" fo:margin-bottom="0in" style:contextual-spacing="false" fo:line-height="98%" fo:text-align="start" style:justify-single-word="false" fo:text-indent="0in" style:auto-text-indent="false">
        <style:tab-stops>
          <style:tab-stop style:position="0.2945in"/>
          <style:tab-stop style:position="1.0547in"/>
          <style:tab-stop style:position="1.5835in"/>
          <style:tab-stop style:position="2.0472in"/>
          <style:tab-stop style:position="2.4744in"/>
        </style:tab-stops>
      </style:paragraph-properties>
    </style:style>
    <style:style style:name="P22" style:family="paragraph" style:parent-style-name="List_20_Paragraph" style:list-style-name="WWNum6">
      <style:paragraph-properties fo:margin-left="0.4681in" fo:margin-right="0.8929in" fo:margin-top="0in" fo:margin-bottom="0in" style:contextual-spacing="false" fo:line-height="98%" fo:text-align="start" style:justify-single-word="false" fo:text-indent="-0.2465in" style:auto-text-indent="false" fo:break-before="column">
        <style:tab-stops>
          <style:tab-stop style:position="0.4327in"/>
          <style:tab-stop style:position="0.4681in"/>
        </style:tab-stops>
      </style:paragraph-properties>
    </style:style>
    <style:style style:name="P23" style:family="paragraph" style:parent-style-name="List_20_Paragraph" style:list-style-name="WWNum6">
      <style:paragraph-properties fo:margin-left="0.4681in" fo:margin-right="0.3874in" fo:margin-top="0in" fo:margin-bottom="0in" style:contextual-spacing="false" fo:line-height="98%" fo:text-align="start" style:justify-single-word="false" fo:text-indent="-0.2465in" style:auto-text-indent="false">
        <style:tab-stops>
          <style:tab-stop style:position="0.4327in"/>
          <style:tab-stop style:position="0.4681in"/>
        </style:tab-stops>
      </style:paragraph-properties>
    </style:style>
    <style:style style:name="P24" style:family="paragraph" style:parent-style-name="List_20_Paragraph" style:list-style-name="WWNum5">
      <style:paragraph-properties fo:margin-left="0.6382in" fo:margin-right="0.098in" fo:margin-top="0in" fo:margin-bottom="0in" style:contextual-spacing="false" fo:line-height="115%" fo:text-align="start" style:justify-single-word="false" fo:text-indent="-0.2508in" style:auto-text-indent="false">
        <style:tab-stops>
          <style:tab-stop style:position="0.6382in"/>
        </style:tab-stops>
      </style:paragraph-properties>
    </style:style>
    <style:style style:name="P25" style:family="paragraph" style:parent-style-name="List_20_Paragraph" style:list-style-name="WWNum5">
      <style:paragraph-properties fo:margin-left="0.6382in" fo:margin-right="0in" fo:margin-top="0in" fo:margin-bottom="0in" style:contextual-spacing="false" fo:line-height="0.1563in" fo:text-align="start" style:justify-single-word="false" fo:text-indent="-0.25in" style:auto-text-indent="false">
        <style:tab-stops>
          <style:tab-stop style:position="0.6382in"/>
        </style:tab-stops>
      </style:paragraph-properties>
    </style:style>
    <style:style style:name="P26" style:family="paragraph" style:parent-style-name="List_20_Paragraph" style:list-style-name="WWNum6">
      <style:paragraph-properties fo:margin-left="0.1382in" fo:margin-right="0.2366in" fo:margin-top="0.039in" fo:margin-bottom="0in" style:contextual-spacing="false" fo:line-height="93%" fo:text-align="start" style:justify-single-word="false" fo:text-indent="0in" style:auto-text-indent="false">
        <style:tab-stops>
          <style:tab-stop style:position="0.3201in"/>
        </style:tab-stops>
      </style:paragraph-properties>
    </style:style>
    <style:style style:name="P27" style:family="paragraph" style:parent-style-name="List_20_Paragraph" style:list-style-name="WWNum6">
      <style:paragraph-properties fo:margin-left="0.1382in" fo:margin-right="0.4898in" fo:margin-top="0.0465in" fo:margin-bottom="0in" style:contextual-spacing="false" fo:line-height="93%" fo:text-align="start" style:justify-single-word="false" fo:text-indent="0in" style:auto-text-indent="false">
        <style:tab-stops>
          <style:tab-stop style:position="0.2937in"/>
        </style:tab-stops>
      </style:paragraph-properties>
    </style:style>
    <style:style style:name="P28" style:family="paragraph" style:parent-style-name="List_20_Paragraph" style:list-style-name="WWNum6">
      <style:paragraph-properties fo:margin-left="0.1382in" fo:margin-right="0.5791in" fo:margin-top="0.0591in" fo:margin-bottom="0in" style:contextual-spacing="false" fo:line-height="93%" fo:text-align="start" style:justify-single-word="false" fo:text-indent="0in" style:auto-text-indent="false">
        <style:tab-stops>
          <style:tab-stop style:position="0.2937in"/>
        </style:tab-stops>
      </style:paragraph-properties>
    </style:style>
    <style:style style:name="P29" style:family="paragraph" style:parent-style-name="List_20_Paragraph" style:list-style-name="WWNum6">
      <style:paragraph-properties fo:margin-left="0.222in" fo:margin-right="0.5626in" fo:margin-top="0.0346in" fo:margin-bottom="0in" style:contextual-spacing="false" fo:line-height="93%" fo:text-align="start" style:justify-single-word="false" fo:text-indent="0in" style:auto-text-indent="false">
        <style:tab-stops>
          <style:tab-stop style:position="0.4335in"/>
        </style:tab-stops>
      </style:paragraph-properties>
    </style:style>
    <style:style style:name="P30" style:family="paragraph" style:parent-style-name="List_20_Paragraph" style:list-style-name="WWNum6">
      <style:paragraph-properties fo:margin-left="0.1382in" fo:margin-right="0.5827in" fo:margin-top="0.0425in" fo:margin-bottom="0in" style:contextual-spacing="false" fo:line-height="91%" fo:text-align="start" style:justify-single-word="false" fo:text-indent="0in" style:auto-text-indent="false">
        <style:tab-stops>
          <style:tab-stop style:position="0.2937in"/>
        </style:tab-stops>
      </style:paragraph-properties>
    </style:style>
    <style:style style:name="P31" style:family="paragraph" style:parent-style-name="List_20_Paragraph" style:list-style-name="WWNum6">
      <style:paragraph-properties fo:margin-left="0.1382in" fo:margin-right="0.4299in" fo:margin-top="0.0307in" fo:margin-bottom="0in" style:contextual-spacing="false" fo:line-height="121%" fo:text-align="start" style:justify-single-word="false" fo:text-indent="0in" style:auto-text-indent="false">
        <style:tab-stops>
          <style:tab-stop style:position="0.2937in"/>
        </style:tab-stops>
      </style:paragraph-properties>
    </style:style>
    <style:style style:name="P32" style:family="paragraph" style:parent-style-name="List_20_Paragraph" style:list-style-name="WWNum6">
      <style:paragraph-properties fo:margin-left="0.3839in" fo:margin-right="0.6811in" fo:margin-top="0in" fo:margin-bottom="0in" style:contextual-spacing="false" fo:line-height="105%" fo:text-align="start" style:justify-single-word="false" fo:text-indent="-0.2465in" style:auto-text-indent="false">
        <style:tab-stops>
          <style:tab-stop style:position="0.2929in"/>
          <style:tab-stop style:position="0.3839in"/>
        </style:tab-stops>
      </style:paragraph-properties>
    </style:style>
    <style:style style:name="P33" style:family="paragraph" style:parent-style-name="List_20_Paragraph" style:list-style-name="WWNum6">
      <style:paragraph-properties fo:margin-left="0.128in" fo:margin-right="0in" fo:margin-top="0.011in" fo:margin-bottom="0in" style:contextual-spacing="false" fo:line-height="100%" fo:text-align="end" style:justify-single-word="false" fo:text-indent="-0.128in" style:auto-text-indent="false" fo:break-before="column">
        <style:tab-stops>
          <style:tab-stop style:position="0.128in"/>
        </style:tab-stops>
      </style:paragraph-properties>
      <style:text-properties fo:font-size="8pt" style:font-size-asian="8pt"/>
    </style:style>
    <style:style style:name="P34" style:family="paragraph" style:parent-style-name="List_20_Paragraph" style:list-style-name="WWNum6">
      <style:paragraph-properties fo:margin-left="0.6382in" fo:margin-right="0in" fo:margin-top="0.0472in" fo:margin-bottom="0in" style:contextual-spacing="false" style:line-height-at-least="0.1945in" fo:text-align="start" style:justify-single-word="false" fo:text-indent="-0.2508in" style:auto-text-indent="false">
        <style:tab-stops>
          <style:tab-stop style:position="0.6382in"/>
        </style:tab-stops>
      </style:paragraph-properties>
    </style:style>
    <style:style style:name="P35" style:family="paragraph" style:parent-style-name="List_20_Paragraph" style:list-style-name="WWNum7">
      <style:paragraph-properties fo:margin-left="0.6382in" fo:margin-right="0in" fo:margin-top="0in" fo:margin-bottom="0in" style:contextual-spacing="false" fo:line-height="113%" fo:text-align="start" style:justify-single-word="false" fo:text-indent="-0.2508in" style:auto-text-indent="false">
        <style:tab-stops>
          <style:tab-stop style:position="0.6382in"/>
        </style:tab-stops>
      </style:paragraph-properties>
    </style:style>
    <style:style style:name="P36" style:family="paragraph" style:parent-style-name="List_20_Paragraph" style:list-style-name="WWNum6">
      <style:paragraph-properties fo:margin-left="0.4681in" fo:margin-right="0.3744in" fo:margin-top="0.0374in" fo:margin-bottom="0in" style:contextual-spacing="false" fo:line-height="128%" fo:text-align="start" style:justify-single-word="false" fo:text-indent="-0.2465in" style:auto-text-indent="false">
        <style:tab-stops>
          <style:tab-stop style:position="0.4327in"/>
          <style:tab-stop style:position="0.4681in"/>
        </style:tab-stops>
      </style:paragraph-properties>
    </style:style>
    <style:style style:name="P37" style:family="paragraph" style:parent-style-name="Standard">
      <style:paragraph-properties fo:margin-left="0.161in" fo:margin-right="0.0264in" fo:margin-top="0.0744in" fo:margin-bottom="0in" style:contextual-spacing="false" fo:line-height="98%" fo:text-align="center" style:justify-single-word="false" fo:text-indent="0in" style:auto-text-indent="false"/>
    </style:style>
    <style:style style:name="P38" style:family="paragraph" style:parent-style-name="Standard">
      <style:paragraph-properties fo:margin-left="0.1382in" fo:margin-right="0.3327in" fo:margin-top="0in" fo:margin-bottom="0in" style:contextual-spacing="false" fo:line-height="98%" fo:text-align="start" style:justify-single-word="false" fo:text-indent="0in" style:auto-text-indent="false"/>
    </style:style>
    <style:style style:name="P39" style:family="paragraph" style:parent-style-name="Standard">
      <style:paragraph-properties fo:margin-left="0.089in" fo:margin-right="0.3063in" fo:margin-top="0.0307in" fo:margin-bottom="0in" style:contextual-spacing="false" fo:line-height="98%" fo:text-align="start" style:justify-single-word="false" fo:text-indent="0in" style:auto-text-indent="false"/>
    </style:style>
    <style:style style:name="P40" style:family="paragraph" style:parent-style-name="Standard">
      <style:paragraph-properties fo:margin-left="0.1516in" fo:margin-right="0in" fo:margin-top="0.0063in" fo:margin-bottom="0in" style:contextual-spacing="false" fo:line-height="98%" fo:text-align="start" style:justify-single-word="false" fo:text-indent="0.0366in" style:auto-text-indent="false"/>
    </style:style>
    <style:style style:name="P41" style:family="paragraph" style:parent-style-name="Standard">
      <style:paragraph-properties fo:margin-left="0.161in" fo:margin-right="0.4626in" fo:margin-top="0.0728in" fo:margin-bottom="0in" style:contextual-spacing="false" fo:line-height="103%" fo:text-align="center" style:justify-single-word="false" fo:text-indent="0.0437in" style:auto-text-indent="false" fo:break-before="column"/>
    </style:style>
    <style:style style:name="P42" style:family="paragraph" style:parent-style-name="Standard">
      <style:paragraph-properties fo:margin-left="0.1929in" fo:margin-right="0.0366in" fo:margin-top="0in" fo:margin-bottom="0in" style:contextual-spacing="false" fo:line-height="103%" fo:text-align="center" style:justify-single-word="false" fo:text-indent="0in" style:auto-text-indent="false"/>
    </style:style>
    <style:style style:name="P43" style:family="paragraph" style:parent-style-name="Standard">
      <style:paragraph-properties fo:margin-left="0.1382in" fo:margin-right="0.0362in" fo:margin-top="0.0736in" fo:margin-bottom="0in" style:contextual-spacing="false" fo:line-height="95%" fo:text-align="start" style:justify-single-word="false" fo:text-indent="0in" style:auto-text-indent="false"/>
    </style:style>
    <style:style style:name="P44" style:family="paragraph" style:parent-style-name="Standard">
      <style:paragraph-properties fo:margin-left="0.3098in" fo:margin-right="0in" fo:margin-top="0.0016in" fo:margin-bottom="0in" style:contextual-spacing="false" fo:line-height="95%" fo:text-align="center" style:justify-single-word="false" fo:text-indent="0.0256in" style:auto-text-indent="false"/>
    </style:style>
    <style:style style:name="P45" style:family="paragraph" style:parent-style-name="Standard">
      <style:paragraph-properties fo:margin-left="0.1925in" fo:margin-right="0.0508in" fo:margin-top="0.0091in" fo:margin-bottom="0in" style:contextual-spacing="false" fo:line-height="95%" fo:text-align="justify" style:justify-single-word="false" fo:text-indent="0in" style:auto-text-indent="false"/>
    </style:style>
    <style:style style:name="P46" style:family="paragraph" style:parent-style-name="Standard">
      <style:paragraph-properties fo:margin-left="0.3272in" fo:margin-right="0in" fo:margin-top="0.0528in" fo:margin-bottom="0in" style:contextual-spacing="false" fo:text-align="start" style:justify-single-word="false" fo:text-indent="0in" style:auto-text-indent="false"/>
    </style:style>
    <style:style style:name="P47" style:family="paragraph" style:parent-style-name="Standard">
      <style:paragraph-properties fo:margin-left="0.3272in" fo:margin-right="0in" fo:margin-top="0.0752in" fo:margin-bottom="0in" style:contextual-spacing="false" fo:text-align="start" style:justify-single-word="false" fo:text-indent="0in" style:auto-text-indent="false"/>
    </style:style>
    <style:style style:name="P48" style:family="paragraph" style:parent-style-name="Standard">
      <style:paragraph-properties fo:margin-left="1.3339in" fo:margin-right="0in" fo:margin-top="0in" fo:margin-bottom="0in" style:contextual-spacing="false" fo:text-align="start" style:justify-single-word="false" fo:text-indent="0in" style:auto-text-indent="false"/>
    </style:style>
    <style:style style:name="P49" style:family="paragraph" style:parent-style-name="Standard">
      <style:paragraph-properties fo:margin-left="0.1665in" fo:margin-right="0in" fo:margin-top="0.0291in" fo:margin-bottom="0in" style:contextual-spacing="false" fo:text-align="start" style:justify-single-word="false" fo:text-indent="0in" style:auto-text-indent="false" fo:break-before="column"/>
    </style:style>
    <style:style style:name="P50" style:family="paragraph" style:parent-style-name="Standard">
      <style:paragraph-properties fo:margin-left="0.172in" fo:margin-right="0in" fo:margin-top="0.0291in" fo:margin-bottom="0in" style:contextual-spacing="false" fo:text-align="start" style:justify-single-word="false" fo:text-indent="0in" style:auto-text-indent="false" fo:break-before="column"/>
    </style:style>
    <style:style style:name="P51" style:family="paragraph" style:parent-style-name="Standard">
      <style:paragraph-properties fo:margin-left="0.1402in" fo:margin-right="0in" fo:margin-top="0.0055in" fo:margin-bottom="0in" style:contextual-spacing="false" fo:text-align="start" style:justify-single-word="false" fo:text-indent="0in" style:auto-text-indent="false"/>
    </style:style>
    <style:style style:name="P52" style:family="paragraph" style:parent-style-name="Standard">
      <style:paragraph-properties fo:margin-left="0.1382in" fo:margin-right="0in" fo:margin-top="0in" fo:margin-bottom="0in" style:contextual-spacing="false" fo:text-align="start" style:justify-single-word="false" fo:text-indent="0in" style:auto-text-indent="false"/>
    </style:style>
    <style:style style:name="P53" style:family="paragraph" style:parent-style-name="Standard">
      <style:paragraph-properties fo:margin-left="0.089in" fo:margin-right="0in" fo:margin-top="0.0083in" fo:margin-bottom="0in" style:contextual-spacing="false" fo:text-align="start" style:justify-single-word="false" fo:text-indent="0in" style:auto-text-indent="false" fo:break-before="column"/>
    </style:style>
    <style:style style:name="P54" style:family="paragraph" style:parent-style-name="Standard">
      <style:paragraph-properties fo:margin-top="0.0047in" fo:margin-bottom="0.0165in" style:contextual-spacing="false" fo:line-height="100%" fo:break-before="column"/>
      <style:text-properties fo:font-size="1.5pt" style:font-size-asian="1.5pt"/>
    </style:style>
    <style:style style:name="P55" style:family="paragraph" style:parent-style-name="Standard">
      <style:paragraph-properties fo:margin-left="0.5543in" fo:margin-right="0.3327in" fo:margin-top="0.0602in" fo:margin-bottom="0in" style:contextual-spacing="false" fo:line-height="100%" fo:text-align="start" style:justify-single-word="false" fo:text-indent="0in" style:auto-text-indent="false"/>
    </style:style>
    <style:style style:name="P56" style:family="paragraph" style:parent-style-name="Standard">
      <style:paragraph-properties fo:margin-left="0.5543in" fo:margin-right="0.2189in" fo:margin-top="0in" fo:margin-bottom="0in" style:contextual-spacing="false" fo:line-height="100%" fo:text-align="start" style:justify-single-word="false" fo:text-indent="0in" style:auto-text-indent="false"/>
    </style:style>
    <style:style style:name="P57" style:family="paragraph" style:parent-style-name="Standard">
      <style:paragraph-properties fo:margin-left="0.1547in" fo:margin-right="0in" fo:margin-top="0.0291in" fo:margin-bottom="0in" style:contextual-spacing="false" fo:line-height="100%" fo:text-align="center" style:justify-single-word="false" fo:text-indent="0in" style:auto-text-indent="false" fo:break-before="column"/>
    </style:style>
    <style:style style:name="P58" style:family="paragraph" style:parent-style-name="Standard">
      <style:paragraph-properties fo:margin-left="0.3098in" fo:margin-right="2.0209in" fo:margin-top="0in" fo:margin-bottom="0in" style:contextual-spacing="false" fo:line-height="100%" fo:text-align="center" style:justify-single-word="false" fo:text-indent="0in" style:auto-text-indent="false"/>
    </style:style>
    <style:style style:name="P59" style:family="paragraph" style:parent-style-name="Standard">
      <style:paragraph-properties fo:margin-left="0.2217in" fo:margin-right="0.0264in" fo:margin-top="0.0291in" fo:margin-bottom="0in" style:contextual-spacing="false" fo:line-height="100%" fo:text-align="center" style:justify-single-word="false" fo:text-indent="-0.0272in" style:auto-text-indent="false" fo:break-before="column"/>
    </style:style>
    <style:style style:name="P60" style:family="paragraph" style:parent-style-name="Standard">
      <style:paragraph-properties fo:margin-left="0.5543in" fo:margin-right="0.3327in" fo:margin-top="0.0071in" fo:margin-bottom="0in" style:contextual-spacing="false" fo:line-height="86%" fo:text-align="start" style:justify-single-word="false" fo:text-indent="0in" style:auto-text-indent="false"/>
    </style:style>
    <style:style style:name="P61" style:family="paragraph" style:parent-style-name="Standard">
      <style:paragraph-properties fo:margin-left="0.5543in" fo:margin-right="0in" fo:margin-top="0.0528in" fo:margin-bottom="0in" style:contextual-spacing="false" fo:line-height="0.1583in" fo:text-align="start" style:justify-single-word="false" fo:text-indent="0in" style:auto-text-indent="false"/>
    </style:style>
    <style:style style:name="P62" style:family="paragraph" style:parent-style-name="Standard">
      <style:paragraph-properties fo:margin-left="0.3382in" fo:margin-right="0in" fo:margin-top="0in" fo:margin-bottom="0in" style:contextual-spacing="false" fo:line-height="0.1583in" fo:text-align="start" style:justify-single-word="false" fo:text-indent="0in" style:auto-text-indent="false"/>
    </style:style>
    <style:style style:name="P63" style:family="paragraph" style:parent-style-name="Standard">
      <style:paragraph-properties fo:margin-left="0.5543in" fo:margin-right="0in" fo:margin-top="0in" fo:margin-bottom="0in" style:contextual-spacing="false" fo:line-height="0.148in" fo:text-align="start" style:justify-single-word="false" fo:text-indent="0in" style:auto-text-indent="false">
        <style:tab-stops>
          <style:tab-stop style:position="1.1102in"/>
          <style:tab-stop style:position="2.0217in"/>
          <style:tab-stop style:position="2.7854in"/>
        </style:tab-stops>
      </style:paragraph-properties>
    </style:style>
    <style:style style:name="P64" style:family="paragraph" style:parent-style-name="Standard">
      <style:paragraph-properties fo:margin-left="0.5543in" fo:margin-right="0.7661in" fo:margin-top="0in" fo:margin-bottom="0in" style:contextual-spacing="false" fo:line-height="93%" fo:text-align="start" style:justify-single-word="false" fo:text-indent="0in" style:auto-text-indent="false">
        <style:tab-stops>
          <style:tab-stop style:position="1.4555in"/>
          <style:tab-stop style:position="2.2335in"/>
          <style:tab-stop style:position="2.5252in"/>
        </style:tab-stops>
      </style:paragraph-properties>
    </style:style>
    <style:style style:name="P65" style:family="paragraph" style:parent-style-name="Standard">
      <style:paragraph-properties fo:margin-left="0.0118in" fo:margin-right="3.8382in" fo:margin-top="0in" fo:margin-bottom="0in" style:contextual-spacing="false" fo:line-height="0.1126in" fo:text-align="center" style:justify-single-word="false" fo:text-indent="0in" style:auto-text-indent="false"/>
    </style:style>
    <style:style style:name="P66" style:family="paragraph" style:parent-style-name="Standard">
      <style:paragraph-properties fo:margin-left="0in" fo:margin-right="3.8382in" fo:margin-top="0in" fo:margin-bottom="0in" style:contextual-spacing="false" fo:line-height="0.1126in" fo:text-align="center" style:justify-single-word="false" fo:text-indent="0in" style:auto-text-indent="false"/>
    </style:style>
    <style:style style:name="P67" style:family="paragraph" style:parent-style-name="Standard">
      <style:paragraph-properties fo:margin-left="0.3098in" fo:margin-right="0in" fo:margin-top="0.0291in" fo:margin-bottom="0in" style:contextual-spacing="false" fo:text-align="center" style:justify-single-word="false" fo:text-indent="0in" style:auto-text-indent="false"/>
    </style:style>
    <style:style style:name="P68" style:family="paragraph" style:parent-style-name="Standard">
      <style:paragraph-properties fo:margin-left="0.2945in" fo:margin-right="0in" fo:margin-top="0.0193in" fo:margin-bottom="0in" style:contextual-spacing="false" fo:text-align="center" style:justify-single-word="false" fo:text-indent="0in" style:auto-text-indent="false"/>
    </style:style>
    <style:style style:name="P69" style:family="paragraph" style:parent-style-name="Standard">
      <style:paragraph-properties fo:margin-left="0in" fo:margin-right="1.7366in" fo:margin-top="0.0291in" fo:margin-bottom="0in" style:contextual-spacing="false" fo:text-align="center" style:justify-single-word="false" fo:text-indent="0in" style:auto-text-indent="false" fo:break-before="column"/>
    </style:style>
    <style:style style:name="P70" style:family="paragraph" style:parent-style-name="Standard">
      <style:paragraph-properties fo:margin-left="0.3362in" fo:margin-right="0in" fo:margin-top="0.0055in" fo:margin-bottom="0in" style:contextual-spacing="false" fo:line-height="0.1173in" fo:text-align="center" style:justify-single-word="false" fo:text-indent="0in" style:auto-text-indent="false"/>
    </style:style>
    <style:style style:name="P71" style:family="paragraph" style:parent-style-name="Standard">
      <style:paragraph-properties fo:margin-left="0in" fo:margin-right="1.7102in" fo:margin-top="0.0055in" fo:margin-bottom="0in" style:contextual-spacing="false" fo:line-height="0.1173in" fo:text-align="center" style:justify-single-word="false" fo:text-indent="0in" style:auto-text-indent="false"/>
    </style:style>
    <style:style style:name="P72" style:family="paragraph" style:parent-style-name="Standard" style:master-page-name="Converted3">
      <style:paragraph-properties fo:margin-left="0.1382in" fo:margin-right="0in" fo:margin-top="0.0661in" fo:margin-bottom="0in" style:contextual-spacing="false" fo:line-height="110%" fo:text-align="start" style:justify-single-word="false" fo:text-indent="0in" style:auto-text-indent="false" style:page-number="auto"/>
    </style:style>
    <style:style style:name="P73" style:family="paragraph" style:parent-style-name="Standard">
      <style:paragraph-properties fo:margin-left="0.6382in" fo:margin-right="0.0673in" fo:margin-top="0.0118in" fo:margin-bottom="0in" style:contextual-spacing="false" fo:line-height="110%" fo:text-align="start" style:justify-single-word="false" fo:text-indent="0in" style:auto-text-indent="false"/>
    </style:style>
    <style:style style:name="P74" style:family="paragraph" style:parent-style-name="Standard">
      <style:paragraph-properties fo:margin-left="0.6382in" fo:margin-right="0.2311in" fo:margin-top="0.0244in" fo:margin-bottom="0in" style:contextual-spacing="false" fo:line-height="110%" fo:text-align="start" style:justify-single-word="false" fo:text-indent="0in" style:auto-text-indent="false"/>
    </style:style>
    <style:style style:name="P75" style:family="paragraph" style:parent-style-name="Standard">
      <style:paragraph-properties fo:margin-left="0.1972in" fo:margin-right="0.0264in" fo:margin-top="0in" fo:margin-bottom="0in" style:contextual-spacing="false" fo:line-height="110%" fo:text-align="justify" style:justify-single-word="false" fo:text-indent="0.0272in" style:auto-text-indent="false"/>
    </style:style>
    <style:style style:name="P76" style:family="paragraph" style:parent-style-name="Standard">
      <style:paragraph-properties fo:margin-left="0.2244in" fo:margin-right="0.0535in" fo:margin-top="0in" fo:margin-bottom="0in" style:contextual-spacing="false" fo:line-height="115%" fo:text-align="center" style:justify-single-word="false" fo:text-indent="0in" style:auto-text-indent="false"/>
    </style:style>
    <style:style style:name="P77" style:family="paragraph" style:parent-style-name="Standard">
      <style:paragraph-properties fo:margin-left="0.1299in" fo:margin-right="0in" fo:margin-top="0.0189in" fo:margin-bottom="0in" style:contextual-spacing="false" fo:line-height="115%" fo:text-align="center" style:justify-single-word="false" fo:text-indent="0in" style:auto-text-indent="false"/>
    </style:style>
    <style:style style:name="P78" style:family="paragraph" style:parent-style-name="Standard">
      <style:paragraph-properties fo:margin-left="0.1673in" fo:margin-right="0in" fo:margin-top="0in" fo:margin-bottom="0in" style:contextual-spacing="false" fo:text-align="justify" style:justify-single-word="false" fo:text-indent="0in" style:auto-text-indent="false"/>
    </style:style>
    <style:style style:name="P79" style:family="paragraph" style:parent-style-name="Standard">
      <style:paragraph-properties fo:margin-left="0.1382in" fo:margin-right="0.2189in" fo:margin-top="0.0654in" fo:margin-bottom="0in" style:contextual-spacing="false" fo:line-height="91%" fo:text-align="start" style:justify-single-word="false" fo:text-indent="0in" style:auto-text-indent="false" fo:break-before="column"/>
    </style:style>
    <style:style style:name="P80" style:family="paragraph" style:parent-style-name="Standard">
      <style:paragraph-properties fo:margin-left="0.1382in" fo:margin-right="3.8445in" fo:margin-top="0in" fo:margin-bottom="0in" style:contextual-spacing="false" fo:line-height="91%" fo:text-align="start" style:justify-single-word="false" fo:text-indent="0.2in" style:auto-text-indent="false"/>
    </style:style>
    <style:style style:name="P81" style:family="paragraph" style:parent-style-name="Standard">
      <style:paragraph-properties fo:margin-left="0.1382in" fo:margin-right="3.8591in" fo:margin-top="0.0047in" fo:margin-bottom="0in" style:contextual-spacing="false" fo:line-height="91%" fo:text-align="justify" style:justify-single-word="false" fo:text-indent="0in" style:auto-text-indent="false"/>
    </style:style>
    <style:style style:name="P82" style:family="paragraph" style:parent-style-name="Standard">
      <style:paragraph-properties fo:margin-left="0.3839in" fo:margin-right="0in" fo:margin-top="0in" fo:margin-bottom="0in" style:contextual-spacing="false" fo:line-height="0.1193in" fo:text-align="start" style:justify-single-word="false" fo:text-indent="0in" style:auto-text-indent="false"/>
    </style:style>
    <style:style style:name="P83" style:family="paragraph" style:parent-style-name="Standard">
      <style:paragraph-properties fo:margin-left="0.1382in" fo:margin-right="0in" fo:margin-top="0in" fo:margin-bottom="0in" style:contextual-spacing="false" fo:line-height="0.1256in" fo:text-align="start" style:justify-single-word="false" fo:text-indent="0in" style:auto-text-indent="false"/>
    </style:style>
    <style:style style:name="P84" style:family="paragraph" style:parent-style-name="Standard">
      <style:paragraph-properties fo:margin-left="0.1382in" fo:margin-right="0in" fo:margin-top="0in" fo:margin-bottom="0in" style:contextual-spacing="false" fo:line-height="0.0957in" fo:text-align="start" style:justify-single-word="false" fo:text-indent="0in" style:auto-text-indent="false"/>
    </style:style>
    <style:style style:name="P85" style:family="paragraph" style:parent-style-name="Standard">
      <style:paragraph-properties fo:margin-left="0.1382in" fo:margin-right="0in" fo:margin-top="0in" fo:margin-bottom="0in" style:contextual-spacing="false" fo:line-height="0.122in" fo:text-align="start" style:justify-single-word="false" fo:text-indent="0in" style:auto-text-indent="false"/>
    </style:style>
    <style:style style:name="P86" style:family="paragraph" style:parent-style-name="Standard">
      <style:paragraph-properties fo:margin-left="0.3382in" fo:margin-right="4.3402in" fo:margin-top="0.1146in" fo:margin-bottom="0in" style:contextual-spacing="false" fo:line-height="143%" fo:text-align="start" style:justify-single-word="false" fo:text-indent="0in" style:auto-text-indent="false"/>
    </style:style>
    <style:style style:name="P87" style:family="paragraph" style:parent-style-name="Standard">
      <style:paragraph-properties fo:margin-left="0.1382in" fo:margin-right="0in" fo:margin-top="0in" fo:margin-bottom="0in" style:contextual-spacing="false" fo:line-height="0.1528in" fo:text-align="justify" style:justify-single-word="false" fo:text-indent="0in" style:auto-text-indent="false"/>
    </style:style>
    <style:style style:name="P88" style:family="paragraph" style:parent-style-name="Text_20_body">
      <style:paragraph-properties fo:margin-left="0in" fo:margin-right="0in"/>
      <style:text-properties fo:font-size="10pt" style:font-size-asian="10pt"/>
    </style:style>
    <style:style style:name="P89" style:family="paragraph" style:parent-style-name="Text_20_body">
      <style:paragraph-properties fo:margin-left="0in" fo:margin-right="0in" fo:margin-top="0.0272in" fo:margin-bottom="0in" style:contextual-spacing="false"/>
      <style:text-properties fo:font-size="10pt" style:font-size-asian="10pt"/>
    </style:style>
    <style:style style:name="P90" style:family="paragraph" style:parent-style-name="Text_20_body">
      <style:paragraph-properties fo:margin-left="0in" fo:margin-right="0in" fo:margin-top="0.1429in" fo:margin-bottom="0in" style:contextual-spacing="false"/>
      <style:text-properties fo:font-size="10pt" style:font-size-asian="10pt"/>
    </style:style>
    <style:style style:name="P91" style:family="paragraph" style:parent-style-name="Text_20_body">
      <style:paragraph-properties fo:margin-left="0in" fo:margin-right="0in" fo:margin-top="0.0209in" fo:margin-bottom="0in" style:contextual-spacing="false"/>
      <style:text-properties fo:font-size="10pt" style:font-size-asian="10pt"/>
    </style:style>
    <style:style style:name="P92" style:family="paragraph" style:parent-style-name="Text_20_body">
      <style:paragraph-properties fo:margin-left="0in" fo:margin-right="0in" fo:margin-top="0.0445in" fo:margin-bottom="0in" style:contextual-spacing="false"/>
      <style:text-properties fo:font-size="10pt" style:font-size-asian="10pt"/>
    </style:style>
    <style:style style:name="P93" style:family="paragraph" style:parent-style-name="Text_20_body">
      <style:paragraph-properties fo:margin-left="0in" fo:margin-right="0in" fo:margin-top="0.0091in" fo:margin-bottom="0in" style:contextual-spacing="false"/>
      <style:text-properties fo:font-size="10pt" style:font-size-asian="10pt"/>
    </style:style>
    <style:style style:name="P94" style:family="paragraph" style:parent-style-name="Text_20_body">
      <style:paragraph-properties fo:margin-left="0in" fo:margin-right="0in" fo:margin-top="0.0291in" fo:margin-bottom="0in" style:contextual-spacing="false"/>
      <style:text-properties fo:font-size="10pt" style:font-size-asian="10pt"/>
    </style:style>
    <style:style style:name="P95" style:family="paragraph" style:parent-style-name="Text_20_body">
      <style:paragraph-properties fo:margin-left="0in" fo:margin-right="0in" fo:margin-top="0.1535in" fo:margin-bottom="0in" style:contextual-spacing="false"/>
      <style:text-properties fo:font-size="10pt" style:font-size-asian="10pt"/>
    </style:style>
    <style:style style:name="P96" style:family="paragraph" style:parent-style-name="Text_20_body">
      <style:paragraph-properties fo:margin-left="0in" fo:margin-right="0in" fo:margin-top="0.0335in" fo:margin-bottom="0in" style:contextual-spacing="false"/>
      <style:text-properties fo:font-size="10pt" fo:font-style="italic" style:font-size-asian="10pt" style:font-style-asian="italic"/>
    </style:style>
    <style:style style:name="P97" style:family="paragraph" style:parent-style-name="Text_20_body">
      <style:paragraph-properties fo:margin-left="0in" fo:margin-right="0in" fo:margin-top="0.0346in" fo:margin-bottom="0in" style:contextual-spacing="false"/>
      <style:text-properties fo:font-size="10pt" fo:font-style="italic" style:font-size-asian="10pt" style:font-style-asian="italic"/>
    </style:style>
    <style:style style:name="P98" style:family="paragraph" style:parent-style-name="Text_20_body">
      <style:paragraph-properties fo:margin-left="0in" fo:margin-right="0in" fo:margin-top="0.0445in" fo:margin-bottom="0in" style:contextual-spacing="false"/>
      <style:text-properties fo:font-size="10pt" fo:font-style="italic" style:font-size-asian="10pt" style:font-style-asian="italic"/>
    </style:style>
    <style:style style:name="P99" style:family="paragraph" style:parent-style-name="Text_20_body">
      <style:paragraph-properties fo:margin-left="0.3272in" fo:margin-right="0in" fo:margin-top="0.0984in" fo:margin-bottom="0in" style:contextual-spacing="false"/>
    </style:style>
    <style:style style:name="P100" style:family="paragraph" style:parent-style-name="Text_20_body">
      <style:paragraph-properties fo:margin-left="0in" fo:margin-right="0in"/>
      <style:text-properties fo:font-size="9pt" fo:font-style="italic" fo:font-weight="bold" style:font-size-asian="9pt" style:font-style-asian="italic" style:font-weight-asian="bold"/>
    </style:style>
    <style:style style:name="P101" style:family="paragraph" style:parent-style-name="Text_20_body">
      <style:paragraph-properties fo:margin-left="0in" fo:margin-right="0in" fo:margin-top="0.1354in" fo:margin-bottom="0in" style:contextual-spacing="false"/>
      <style:text-properties fo:font-size="9pt" fo:font-style="italic" fo:font-weight="bold" style:font-size-asian="9pt" style:font-style-asian="italic" style:font-weight-asian="bold"/>
    </style:style>
    <style:style style:name="P102" style:family="paragraph" style:parent-style-name="Text_20_body">
      <style:paragraph-properties fo:margin-left="0.1382in" fo:margin-right="0.0575in" fo:margin-top="0.0634in" fo:margin-bottom="0in" style:contextual-spacing="false" fo:line-height="98%"/>
    </style:style>
    <style:style style:name="P103" style:family="paragraph" style:parent-style-name="Text_20_body">
      <style:paragraph-properties fo:margin-left="0.1382in" fo:margin-right="0.2854in" fo:margin-top="0.0484in" fo:margin-bottom="0in" style:contextual-spacing="false" fo:line-height="98%"/>
    </style:style>
    <style:style style:name="P104" style:family="paragraph" style:parent-style-name="Text_20_body">
      <style:paragraph-properties fo:margin-left="0.1382in" fo:margin-right="0.3327in" fo:margin-top="0.0701in" fo:margin-bottom="0in" style:contextual-spacing="false" fo:line-height="95%" fo:break-before="column"/>
    </style:style>
    <style:style style:name="P105" style:family="paragraph" style:parent-style-name="Text_20_body">
      <style:paragraph-properties fo:margin-left="0.1382in" fo:margin-right="0.3327in" fo:margin-top="0.0016in" fo:margin-bottom="0in" style:contextual-spacing="false" fo:line-height="95%"/>
    </style:style>
    <style:style style:name="P106" style:family="paragraph" style:parent-style-name="Text_20_body">
      <style:paragraph-properties fo:margin-left="0.1382in" fo:margin-right="0.3327in" fo:margin-top="0.0098in" fo:margin-bottom="0in" style:contextual-spacing="false" fo:line-height="95%"/>
    </style:style>
    <style:style style:name="P107" style:family="paragraph" style:parent-style-name="Text_20_body">
      <style:paragraph-properties fo:margin-left="0.1382in" fo:margin-right="0.5909in" fo:margin-top="0.002in" fo:margin-bottom="0in" style:contextual-spacing="false" fo:line-height="95%"/>
    </style:style>
    <style:style style:name="P108" style:family="paragraph" style:parent-style-name="Text_20_body">
      <style:paragraph-properties fo:margin-left="0.1382in" fo:margin-right="0.5909in" fo:margin-top="0.0516in" fo:margin-bottom="0in" style:contextual-spacing="false" fo:line-height="95%"/>
    </style:style>
    <style:style style:name="P109" style:family="paragraph" style:parent-style-name="Text_20_body" style:master-page-name="Converted1">
      <style:paragraph-properties fo:margin-left="0.1382in" fo:margin-right="0.3854in" fo:margin-top="0.0528in" fo:margin-bottom="0in" style:contextual-spacing="false" fo:line-height="95%" style:page-number="auto"/>
    </style:style>
    <style:style style:name="P110" style:family="paragraph" style:parent-style-name="Text_20_body">
      <style:paragraph-properties fo:margin-left="0.1382in" fo:margin-right="0.098in" fo:margin-top="0.0008in" fo:margin-bottom="0in" style:contextual-spacing="false" fo:line-height="95%"/>
    </style:style>
    <style:style style:name="P111" style:family="paragraph" style:parent-style-name="Text_20_body">
      <style:paragraph-properties fo:margin-left="0.1382in" fo:margin-right="0.0264in" fo:line-height="95%"/>
    </style:style>
    <style:style style:name="P112" style:family="paragraph" style:parent-style-name="Text_20_body">
      <style:paragraph-properties fo:margin-left="0.1382in" fo:margin-right="0.3181in" fo:margin-top="0.0098in" fo:margin-bottom="0in" style:contextual-spacing="false" fo:line-height="95%"/>
    </style:style>
    <style:style style:name="P113" style:family="paragraph" style:parent-style-name="Text_20_body">
      <style:paragraph-properties fo:margin-left="0.1382in" fo:margin-right="0.4465in" fo:line-height="95%"/>
    </style:style>
    <style:style style:name="P114" style:family="paragraph" style:parent-style-name="Text_20_body" style:master-page-name="Converted2">
      <style:paragraph-properties fo:margin-left="0.1382in" fo:margin-right="0.0161in" fo:margin-top="0.0528in" fo:margin-bottom="0in" style:contextual-spacing="false" fo:line-height="95%" style:page-number="auto"/>
    </style:style>
    <style:style style:name="P115" style:family="paragraph" style:parent-style-name="Text_20_body">
      <style:paragraph-properties fo:margin-left="0.1382in" fo:margin-right="0.0161in" fo:margin-top="0.0638in" fo:margin-bottom="0in" style:contextual-spacing="false" fo:line-height="95%"/>
    </style:style>
    <style:style style:name="P116" style:family="paragraph" style:parent-style-name="Text_20_body">
      <style:paragraph-properties fo:margin-left="0.1382in" fo:margin-right="0.361in" fo:margin-top="0.0472in" fo:margin-bottom="0in" style:contextual-spacing="false" fo:line-height="95%" fo:text-align="justify" style:justify-single-word="false"/>
    </style:style>
    <style:style style:name="P117" style:family="paragraph" style:parent-style-name="Text_20_body">
      <style:paragraph-properties fo:margin-left="0.1382in" fo:margin-right="0.2311in" fo:margin-top="0.0484in" fo:margin-bottom="0in" style:contextual-spacing="false" fo:line-height="95%" fo:text-align="justify" style:justify-single-word="false"/>
    </style:style>
    <style:style style:name="P118" style:family="paragraph" style:parent-style-name="Text_20_body">
      <style:paragraph-properties fo:margin-left="0.1382in" fo:margin-right="0.2307in" fo:margin-top="0.0528in" fo:margin-bottom="0in" style:contextual-spacing="false" fo:line-height="95%" fo:text-align="justify" style:justify-single-word="false" fo:break-before="column"/>
    </style:style>
    <style:style style:name="P119" style:family="paragraph" style:parent-style-name="Text_20_body">
      <style:paragraph-properties fo:line-height="95%"/>
    </style:style>
    <style:style style:name="P120" style:family="paragraph" style:parent-style-name="Text_20_body">
      <style:paragraph-properties fo:margin-left="0.1382in" fo:margin-right="0.4654in" fo:line-height="96%"/>
    </style:style>
    <style:style style:name="P121" style:family="paragraph" style:parent-style-name="Text_20_body">
      <style:paragraph-properties fo:margin-left="0.1382in" fo:margin-right="0.0516in" fo:line-height="96%"/>
    </style:style>
    <style:style style:name="P122" style:family="paragraph" style:parent-style-name="Text_20_body">
      <style:paragraph-properties fo:margin-left="0.1382in" fo:margin-right="0.3327in" fo:margin-top="0.05in" fo:margin-bottom="0in" style:contextual-spacing="false" fo:line-height="96%"/>
    </style:style>
    <style:style style:name="P123" style:family="paragraph" style:parent-style-name="Text_20_body">
      <style:paragraph-properties fo:margin-left="0.1382in" fo:margin-right="0.3374in" fo:margin-top="0.05in" fo:margin-bottom="0in" style:contextual-spacing="false" fo:line-height="96%"/>
    </style:style>
    <style:style style:name="P124" style:family="paragraph" style:parent-style-name="Text_20_body">
      <style:paragraph-properties fo:margin-left="0.3382in" fo:margin-right="0in" fo:margin-top="0.0453in" fo:margin-bottom="0in" style:contextual-spacing="false"/>
    </style:style>
    <style:style style:name="P125" style:family="paragraph" style:parent-style-name="Text_20_body">
      <style:paragraph-properties fo:line-height="0.1445in" fo:text-align="justify" style:justify-single-word="false"/>
    </style:style>
    <style:style style:name="P126" style:family="paragraph" style:parent-style-name="Text_20_body">
      <style:paragraph-properties fo:line-height="0.1445in"/>
    </style:style>
    <style:style style:name="P127" style:family="paragraph" style:parent-style-name="Text_20_body">
      <style:paragraph-properties fo:margin-left="0in" fo:margin-right="0in"/>
    </style:style>
    <style:style style:name="P128" style:family="paragraph" style:parent-style-name="Text_20_body">
      <style:paragraph-properties fo:margin-left="0in" fo:margin-right="0in" fo:margin-top="0.0457in" fo:margin-bottom="0in" style:contextual-spacing="false"/>
    </style:style>
    <style:style style:name="P129" style:family="paragraph" style:parent-style-name="Text_20_body">
      <style:paragraph-properties fo:margin-left="0in" fo:margin-right="0in" fo:margin-top="0.1134in" fo:margin-bottom="0in" style:contextual-spacing="false"/>
    </style:style>
    <style:style style:name="P130" style:family="paragraph" style:parent-style-name="Text_20_body">
      <style:paragraph-properties fo:margin-left="0in" fo:margin-right="0in" fo:margin-top="0.1398in" fo:margin-bottom="0in" style:contextual-spacing="false"/>
    </style:style>
    <style:style style:name="P131" style:family="paragraph" style:parent-style-name="Text_20_body">
      <style:paragraph-properties fo:margin-left="0in" fo:margin-right="0in" fo:margin-top="0.0661in" fo:margin-bottom="0in" style:contextual-spacing="false"/>
    </style:style>
    <style:style style:name="P132" style:family="paragraph" style:parent-style-name="Text_20_body">
      <style:paragraph-properties fo:margin-left="0in" fo:margin-right="0in" fo:margin-top="0.1236in" fo:margin-bottom="0in" style:contextual-spacing="false"/>
    </style:style>
    <style:style style:name="P133" style:family="paragraph" style:parent-style-name="Text_20_body">
      <style:paragraph-properties fo:margin-left="0in" fo:margin-right="0in" fo:margin-top="0.1083in" fo:margin-bottom="0in" style:contextual-spacing="false"/>
    </style:style>
    <style:style style:name="P134" style:family="paragraph" style:parent-style-name="Text_20_body">
      <style:paragraph-properties fo:margin-left="0in" fo:margin-right="0in" fo:margin-top="0.0091in" fo:margin-bottom="0in" style:contextual-spacing="false"/>
    </style:style>
    <style:style style:name="P135" style:family="paragraph" style:parent-style-name="Text_20_body">
      <style:paragraph-properties fo:line-height="0.1374in" fo:text-align="justify" style:justify-single-word="false"/>
    </style:style>
    <style:style style:name="P136" style:family="paragraph" style:parent-style-name="Text_20_body">
      <style:paragraph-properties fo:line-height="0.1339in"/>
    </style:style>
    <style:style style:name="P137" style:family="paragraph" style:parent-style-name="Text_20_body">
      <style:paragraph-properties fo:margin-top="0.0689in" fo:margin-bottom="0in" style:contextual-spacing="false"/>
    </style:style>
    <style:style style:name="P138" style:family="paragraph" style:parent-style-name="Text_20_body">
      <style:paragraph-properties fo:margin-top="0.111in" fo:margin-bottom="0in" style:contextual-spacing="false"/>
    </style:style>
    <style:style style:name="P139" style:family="paragraph" style:parent-style-name="Text_20_body">
      <style:paragraph-properties fo:line-height="0.1382in"/>
    </style:style>
    <style:style style:name="P140" style:family="paragraph" style:parent-style-name="Text_20_body">
      <style:paragraph-properties fo:margin-left="0.1382in" fo:margin-right="0.3327in" fo:margin-top="0.0465in" fo:margin-bottom="0in" style:contextual-spacing="false"/>
    </style:style>
    <style:style style:name="P141" style:family="paragraph" style:parent-style-name="Text_20_body">
      <style:paragraph-properties fo:margin-left="0.4516in" fo:margin-right="0in"/>
    </style:style>
    <style:style style:name="P142" style:family="paragraph" style:parent-style-name="Text_20_body">
      <style:paragraph-properties fo:margin-left="0in" fo:margin-right="0in" fo:margin-top="0.0217in" fo:margin-bottom="0in" style:contextual-spacing="false"/>
      <style:text-properties fo:font-size="8pt" style:font-size-asian="8pt"/>
    </style:style>
    <style:style style:name="P143" style:family="paragraph" style:parent-style-name="Text_20_body">
      <style:paragraph-properties fo:margin-left="0in" fo:margin-right="0in" fo:margin-top="0.111in" fo:margin-bottom="0in" style:contextual-spacing="false"/>
      <style:text-properties fo:font-size="8pt" style:font-size-asian="8pt"/>
    </style:style>
    <style:style style:name="P144" style:family="paragraph" style:parent-style-name="Text_20_body">
      <style:paragraph-properties fo:margin-left="0in" fo:margin-right="0in"/>
      <style:text-properties fo:font-size="8pt" style:font-size-asian="8pt"/>
    </style:style>
    <style:style style:name="P145" style:family="paragraph" style:parent-style-name="Text_20_body">
      <style:paragraph-properties fo:margin-left="0in" fo:margin-right="0in" fo:margin-top="0.0362in" fo:margin-bottom="0in" style:contextual-spacing="false"/>
      <style:text-properties fo:font-size="8pt" style:font-size-asian="8pt"/>
    </style:style>
    <style:style style:name="P146" style:family="paragraph" style:parent-style-name="Title" style:master-page-name="Standard">
      <style:paragraph-properties fo:margin-left="0.1283in" fo:margin-right="0.089in" fo:line-height="98%" style:page-number="auto"/>
    </style:style>
    <style:style style:name="P147" style:family="paragraph" style:parent-style-name="Title">
      <style:paragraph-properties fo:margin-left="0in" fo:margin-right="0.1945in" fo:margin-top="0.2075in" fo:margin-bottom="0in" style:contextual-spacing="false" fo:text-align="center" style:justify-single-word="false"/>
    </style:style>
    <style:style style:name="T1" style:family="text">
      <style:text-properties fo:letter-spacing="-0.0047in"/>
    </style:style>
    <style:style style:name="T2" style:family="text">
      <style:text-properties fo:letter-spacing="-0.0016in"/>
    </style:style>
    <style:style style:name="T3" style:family="text">
      <style:text-properties fo:font-size="10pt" style:font-size-asian="10pt"/>
    </style:style>
    <style:style style:name="T4" style:family="text">
      <style:text-properties fo:font-size="10pt" fo:letter-spacing="-0.0043in" style:font-size-asian="10pt"/>
    </style:style>
    <style:style style:name="T5" style:family="text">
      <style:text-properties fo:font-size="10pt" fo:letter-spacing="-0.0028in" style:font-size-asian="10pt"/>
    </style:style>
    <style:style style:name="T6" style:family="text">
      <style:text-properties fo:font-size="10pt" fo:font-style="italic" style:font-size-asian="10pt" style:font-style-asian="italic"/>
    </style:style>
    <style:style style:name="T7" style:family="text">
      <style:text-properties fo:font-size="10pt" fo:letter-spacing="-0.0016in" style:font-size-asian="10pt"/>
    </style:style>
    <style:style style:name="T8" style:family="text">
      <style:text-properties fo:font-size="10pt" fo:letter-spacing="-0.0016in" fo:font-weight="bold" style:font-size-asian="10pt" style:font-weight-asian="bold"/>
    </style:style>
    <style:style style:name="T9" style:family="text">
      <style:text-properties fo:font-size="10pt" fo:font-weight="bold" style:font-size-asian="10pt" style:font-weight-asian="bold"/>
    </style:style>
    <style:style style:name="T10" style:family="text">
      <style:text-properties fo:font-size="10pt" fo:letter-spacing="0.0457in" style:font-size-asian="10pt"/>
    </style:style>
    <style:style style:name="T11" style:family="text">
      <style:text-properties fo:font-size="10pt" fo:letter-spacing="0.028in" style:font-size-asian="10pt"/>
    </style:style>
    <style:style style:name="T12" style:family="text">
      <style:text-properties fo:font-size="10pt" fo:letter-spacing="0.0555in" style:font-size-asian="10pt"/>
    </style:style>
    <style:style style:name="T13" style:family="text">
      <style:text-properties fo:font-size="10pt" fo:letter-spacing="0.0555in" style:font-size-asian="10pt" style:text-scale="150%"/>
    </style:style>
    <style:style style:name="T14" style:family="text">
      <style:text-properties fo:font-size="10pt" fo:letter-spacing="-0.0035in" style:font-size-asian="10pt"/>
    </style:style>
    <style:style style:name="T15" style:family="text">
      <style:text-properties fo:font-size="10pt" fo:letter-spacing="-0.0008in" style:font-size-asian="10pt"/>
    </style:style>
    <style:style style:name="T16" style:family="text">
      <style:text-properties fo:font-size="10pt" fo:letter-spacing="-0.0252in" style:font-size-asian="10pt"/>
    </style:style>
    <style:style style:name="T17" style:family="text">
      <style:text-properties fo:font-size="10pt" fo:letter-spacing="-0.0165in" style:font-size-asian="10pt"/>
    </style:style>
    <style:style style:name="T18" style:family="text">
      <style:text-properties fo:font-size="10pt" fo:letter-spacing="0.0138in" style:font-size-asian="10pt"/>
    </style:style>
    <style:style style:name="T19" style:family="text">
      <style:text-properties fo:font-size="10pt" fo:letter-spacing="0.0217in" style:font-size-asian="10pt"/>
    </style:style>
    <style:style style:name="T20" style:family="text">
      <style:text-properties fo:font-size="10pt" fo:letter-spacing="0.022in" style:font-size-asian="10pt"/>
    </style:style>
    <style:style style:name="T21" style:family="text">
      <style:text-properties fo:font-size="10pt" fo:letter-spacing="0.0008in" style:font-size-asian="10pt"/>
    </style:style>
    <style:style style:name="T22" style:family="text">
      <style:text-properties fo:font-size="10pt" fo:letter-spacing="-0.0071in" style:font-size-asian="10pt"/>
    </style:style>
    <style:style style:name="T23" style:family="text">
      <style:text-properties fo:font-size="9pt" style:font-size-asian="9pt"/>
    </style:style>
    <style:style style:name="T24" style:family="text">
      <style:text-properties fo:font-size="9pt" fo:font-style="italic" style:font-size-asian="9pt" style:font-style-asian="italic"/>
    </style:style>
    <style:style style:name="T25" style:family="text">
      <style:text-properties fo:font-size="9pt" fo:font-style="italic" fo:font-weight="bold" style:font-size-asian="9pt" style:font-style-asian="italic" style:font-weight-asian="bold"/>
    </style:style>
    <style:style style:name="T26" style:family="text">
      <style:text-properties fo:font-size="9pt" fo:letter-spacing="-0.002in" fo:font-style="italic" style:font-size-asian="9pt" style:font-style-asian="italic"/>
    </style:style>
    <style:style style:name="T27" style:family="text">
      <style:text-properties fo:font-size="9pt" fo:letter-spacing="-0.0016in" style:font-size-asian="9pt"/>
    </style:style>
    <style:style style:name="T28" style:family="text">
      <style:text-properties fo:font-size="9pt" fo:letter-spacing="-0.0016in" fo:font-style="italic" fo:font-weight="bold" style:font-size-asian="9pt" style:font-style-asian="italic" style:font-weight-asian="bold"/>
    </style:style>
    <style:style style:name="T29" style:family="text">
      <style:text-properties fo:font-size="9pt" fo:letter-spacing="-0.0008in" fo:font-style="italic" fo:font-weight="bold" style:font-size-asian="9pt" style:font-style-asian="italic" style:font-weight-asian="bold"/>
    </style:style>
    <style:style style:name="T30" style:family="text">
      <style:text-properties style:text-position="super 58%" fo:font-size="9pt" style:font-size-asian="9pt"/>
    </style:style>
    <style:style style:name="T31" style:family="text">
      <style:text-properties style:text-position="0% 100%" fo:font-size="9pt" fo:letter-spacing="-0.0028in" style:font-size-asian="9pt"/>
    </style:style>
    <style:style style:name="T32" style:family="text">
      <style:text-properties style:text-position="0% 100%" fo:font-size="9pt" style:font-size-asian="9pt"/>
    </style:style>
    <style:style style:name="T33" style:family="text">
      <style:text-properties style:text-position="0% 100%" fo:font-size="9pt" fo:font-style="italic" style:font-size-asian="9pt" style:font-style-asian="italic"/>
    </style:style>
    <style:style style:name="T34" style:family="text">
      <style:text-properties style:text-position="0% 100%" fo:font-size="9pt" fo:letter-spacing="0.0555in" fo:font-style="italic" style:font-size-asian="9pt" style:font-style-asian="italic"/>
    </style:style>
    <style:style style:name="T35" style:family="text">
      <style:text-properties style:text-position="0% 100%" fo:font-size="9pt" fo:letter-spacing="0.028in" fo:font-style="italic" style:font-size-asian="9pt" style:font-style-asian="italic"/>
    </style:style>
    <style:style style:name="T36" style:family="text">
      <style:text-properties style:text-position="0% 100%" fo:font-size="9pt" fo:letter-spacing="-0.0016in" style:font-size-asian="9pt"/>
    </style:style>
    <style:style style:name="T37" style:family="text">
      <style:text-properties fo:font-size="9.5pt" fo:font-style="italic" fo:font-weight="bold" style:font-size-asian="9.5pt" style:font-style-asian="italic" style:font-weight-asian="bold"/>
    </style:style>
    <style:style style:name="T38" style:family="text">
      <style:text-properties fo:font-size="9.5pt" style:font-size-asian="9.5pt"/>
    </style:style>
    <style:style style:name="T39" style:family="text">
      <style:text-properties fo:font-size="9.5pt" fo:font-weight="bold" style:font-size-asian="9.5pt" style:font-weight-asian="bold"/>
    </style:style>
    <style:style style:name="T40" style:family="text">
      <style:text-properties fo:font-size="9.5pt" fo:letter-spacing="0.028in" fo:font-weight="bold" style:font-size-asian="9.5pt" style:font-weight-asian="bold"/>
    </style:style>
    <style:style style:name="T41" style:family="text">
      <style:text-properties fo:font-size="9.5pt" fo:letter-spacing="-0.0016in" style:font-size-asian="9.5pt"/>
    </style:style>
    <style:style style:name="T42" style:family="text">
      <style:text-properties fo:font-size="9.5pt" fo:letter-spacing="-0.0008in" style:font-size-asian="9.5pt"/>
    </style:style>
    <style:style style:name="T43" style:family="text">
      <style:text-properties fo:font-size="9.5pt" fo:letter-spacing="0.0555in" style:font-size-asian="9.5pt"/>
    </style:style>
    <style:style style:name="T44" style:family="text">
      <style:text-properties fo:font-size="9.5pt" fo:letter-spacing="0.0189in" style:font-size-asian="9.5pt"/>
    </style:style>
    <style:style style:name="T45" style:family="text">
      <style:text-properties fo:font-size="9.5pt" fo:letter-spacing="-0.0035in" style:font-size-asian="9.5pt"/>
    </style:style>
    <style:style style:name="T46" style:family="text">
      <style:text-properties fo:letter-spacing="-0.0008in"/>
    </style:style>
    <style:style style:name="T47" style:family="text">
      <style:text-properties style:text-position="-25% 100%" fo:font-size="8pt" fo:letter-spacing="-0.0016in" style:font-size-asian="8pt"/>
    </style:style>
    <style:style style:name="T48" style:family="text">
      <style:text-properties fo:font-variant="small-caps" fo:font-size="9.5pt" fo:font-style="italic" style:font-size-asian="9.5pt" style:font-style-asian="italic"/>
    </style:style>
    <style:style style:name="T49" style:family="text">
      <style:text-properties fo:font-variant="small-caps" fo:font-size="9.5pt" fo:letter-spacing="-0.0055in" fo:font-style="italic" style:font-size-asian="9.5pt" style:font-style-asian="italic"/>
    </style:style>
    <style:style style:name="T50" style:family="text">
      <style:text-properties fo:font-variant="small-caps" fo:font-size="9.5pt" fo:letter-spacing="-0.0043in" fo:font-style="italic" style:font-size-asian="9.5pt" style:font-style-asian="italic"/>
    </style:style>
    <style:style style:name="T51" style:family="text">
      <style:text-properties fo:font-variant="small-caps" style:text-position="26% 100%" fo:font-size="9.5pt" fo:letter-spacing="-0.0016in" fo:font-style="italic" style:font-size-asian="9.5pt" style:font-style-asian="italic"/>
    </style:style>
    <style:style style:name="T52" style:family="text">
      <style:text-properties fo:font-size="8.5pt" fo:font-style="italic" style:font-size-asian="8.5pt" style:font-style-asian="italic"/>
    </style:style>
    <style:style style:name="T53" style:family="text">
      <style:text-properties fo:font-weight="bold" style:font-weight-asian="bold"/>
    </style:style>
    <style:style style:name="T54" style:family="text">
      <style:text-properties fo:letter-spacing="0.028in"/>
    </style:style>
    <style:style style:name="T55" style:family="text">
      <style:text-properties fo:letter-spacing="-0.0043in"/>
    </style:style>
    <style:style style:name="T56" style:family="text">
      <style:text-properties fo:letter-spacing="-0.0028in"/>
    </style:style>
    <style:style style:name="T57" style:family="text">
      <style:text-properties fo:letter-spacing="0.0555in"/>
    </style:style>
    <style:style style:name="T58" style:family="text">
      <style:text-properties fo:letter-spacing="0.0008in"/>
    </style:style>
    <style:style style:name="T59" style:family="text">
      <style:text-properties fo:letter-spacing="-0.0035in"/>
    </style:style>
    <style:style style:name="T60" style:family="text">
      <style:text-properties fo:font-size="1.5pt" style:font-size-asian="1.5pt"/>
    </style:style>
    <style:style style:name="T61" style:family="text">
      <style:text-properties fo:font-size="8pt" style:font-size-asian="8pt"/>
    </style:style>
    <style:style style:name="T62" style:family="text">
      <style:text-properties fo:font-size="8pt" fo:letter-spacing="-0.0055in" style:font-size-asian="8pt"/>
    </style:style>
    <style:style style:name="T63" style:family="text">
      <style:text-properties fo:font-size="8pt" fo:letter-spacing="0.028in" style:font-size-asian="8pt"/>
    </style:style>
    <style:style style:name="T64" style:family="text">
      <style:text-properties fo:font-size="8pt" fo:letter-spacing="-0.0035in" style:font-size-asian="8pt"/>
    </style:style>
    <style:style style:name="T65" style:family="text">
      <style:text-properties fo:font-size="8pt" fo:letter-spacing="-0.0071in" style:font-size-asian="8pt"/>
    </style:style>
    <style:style style:name="T66" style:family="text">
      <style:text-properties fo:font-size="8pt" fo:letter-spacing="-0.0016in" style:font-size-asian="8pt"/>
    </style:style>
    <style:style style:name="T67" style:family="text">
      <style:text-properties fo:font-size="8pt" fo:letter-spacing="-0.002in" style:font-size-asian="8pt"/>
    </style:style>
    <style:style style:name="T68" style:family="text">
      <style:text-properties fo:font-size="8pt" fo:letter-spacing="0.0228in" style:font-size-asian="8pt"/>
    </style:style>
    <style:style style:name="T69" style:family="text">
      <style:text-properties fo:font-size="8pt" fo:letter-spacing="-0.0028in" style:font-size-asian="8pt"/>
    </style:style>
    <style:style style:name="T70" style:family="text">
      <style:text-properties fo:font-size="8pt" fo:letter-spacing="-0.0047in" style:font-size-asian="8pt"/>
    </style:style>
    <style:style style:name="T71" style:family="text">
      <style:text-properties fo:font-size="8pt" fo:letter-spacing="0.0063in" style:font-size-asian="8pt"/>
    </style:style>
    <style:style style:name="T72" style:family="text">
      <style:text-properties fo:font-size="8pt" fo:letter-spacing="0.0071in" style:font-size-asian="8pt"/>
    </style:style>
    <style:style style:name="T73" style:family="text">
      <style:text-properties fo:font-size="8pt" fo:letter-spacing="-0.0043in" style:font-size-asian="8pt"/>
    </style:style>
    <style:style style:name="T74" style:family="text">
      <style:text-properties style:text-position="35% 100%" fo:font-size="10pt" style:font-size-asian="10pt"/>
    </style:style>
    <style:style style:name="T75" style:family="text">
      <style:text-properties style:text-position="-10% 100%" fo:font-size="10pt" fo:letter-spacing="-0.0098in" style:font-size-asian="10pt"/>
    </style:style>
    <style:style style:name="T76" style:family="text">
      <style:text-properties style:text-position="-10% 100%" fo:font-size="10pt" fo:letter-spacing="-0.0402in" style:font-size-asian="10pt"/>
    </style:style>
    <style:style style:name="T77" style:family="text">
      <style:text-properties style:text-position="-10% 100%" fo:font-size="10pt" fo:letter-spacing="-0.0563in" style:font-size-asian="10pt"/>
    </style:style>
    <style:style style:name="T78" style:family="text">
      <style:text-properties style:text-position="5% 100%" fo:font-size="10pt" fo:letter-spacing="-0.0016in" style:font-size-asian="10pt"/>
    </style:style>
    <style:style style:name="T79" style:family="text">
      <style:text-properties style:text-position="5% 100%" fo:font-size="10pt" style:font-size-asian="10pt"/>
    </style:style>
    <style:style style:name="T80" style:family="text">
      <style:text-properties style:text-position="5% 100%" fo:font-size="10pt" fo:letter-spacing="-0.0035in" style:font-size-asian="10pt"/>
    </style:style>
    <style:style style:name="T81" style:family="text">
      <style:text-properties style:text-position="5% 100%" fo:font-size="10pt" fo:letter-spacing="-0.0028in" style:font-size-asian="10pt"/>
    </style:style>
    <style:style style:name="T82" style:family="text">
      <style:text-properties style:text-position="8% 100%" fo:font-size="6.5pt" style:font-size-asian="6.5pt"/>
    </style:style>
    <style:style style:name="T83" style:family="text">
      <style:text-properties style:text-position="8% 100%" fo:font-size="6.5pt" fo:letter-spacing="0.0083in" style:font-size-asian="6.5pt"/>
    </style:style>
    <style:style style:name="T84" style:family="text">
      <style:text-properties style:text-position="8% 100%" fo:font-size="6.5pt" fo:letter-spacing="0.0299in" style:font-size-asian="6.5pt"/>
    </style:style>
    <style:style style:name="T85" style:family="text">
      <style:text-properties style:text-position="8% 100%" fo:font-size="6.5pt" fo:letter-spacing="-0.0028in" style:font-size-asian="6.5pt"/>
    </style:style>
    <style:style style:name="T86" style:family="text">
      <style:text-properties style:text-position="8% 100%" fo:font-size="6.5pt" fo:letter-spacing="-0.0016in" style:font-size-asian="6.5pt"/>
    </style:style>
    <style:style style:name="T87" style:family="text">
      <style:text-properties fo:font-size="6.5pt" style:font-size-asian="6.5pt"/>
    </style:style>
    <style:style style:name="T88" style:family="text">
      <style:text-properties fo:font-size="7.5pt" fo:letter-spacing="-0.0016in" fo:font-weight="bold" style:font-size-asian="7.5pt" style:font-weight-asian="bold"/>
    </style:style>
    <style:style style:name="T89" style:family="text">
      <style:text-properties fo:font-size="7.5pt" fo:letter-spacing="-0.0016in" style:font-size-asian="7.5pt"/>
    </style:style>
    <style:style style:name="T90" style:family="text">
      <style:text-properties fo:font-size="7.5pt" fo:font-weight="bold" style:font-size-asian="7.5pt" style:font-weight-asian="bold"/>
    </style:style>
    <style:style style:name="T91" style:family="text">
      <style:text-properties fo:font-size="7.5pt" style:font-size-asian="7.5pt"/>
    </style:style>
    <style:style style:name="T92" style:family="text">
      <style:text-properties fo:font-size="7.5pt" fo:letter-spacing="-0.0043in" style:font-size-asian="7.5pt"/>
    </style:style>
    <style:style style:name="T93" style:family="text">
      <style:text-properties fo:font-size="7.5pt" fo:letter-spacing="-0.0028in" style:font-size-asian="7.5pt"/>
    </style:style>
    <style:style style:name="T94" style:family="text">
      <style:text-properties fo:font-size="7.5pt" fo:letter-spacing="-0.002in" style:font-size-asian="7.5pt"/>
    </style:style>
    <style:style style:name="T95" style:family="text">
      <style:text-properties fo:font-size="7.5pt" fo:letter-spacing="-0.002in" fo:font-weight="bold" style:font-size-asian="7.5pt" style:font-weight-asian="bold"/>
    </style:style>
    <style:style style:name="T96" style:family="text">
      <style:text-properties fo:font-size="7.5pt" fo:letter-spacing="0.028in" style:font-size-asian="7.5pt"/>
    </style:style>
    <style:style style:name="T97" style:family="text">
      <style:text-properties fo:font-size="7.5pt" fo:letter-spacing="0.028in" fo:font-weight="bold" style:font-size-asian="7.5pt" style:font-weight-asian="bold"/>
    </style:style>
    <style:style style:name="T98" style:family="text">
      <style:text-properties fo:font-size="7.5pt" fo:letter-spacing="-0.0035in" fo:font-weight="bold" style:font-size-asian="7.5pt" style:font-weight-asian="bold"/>
    </style:style>
    <style:style style:name="T99" style:family="text">
      <style:text-properties fo:font-size="7.5pt" fo:letter-spacing="-0.0035in" style:font-size-asian="7.5pt"/>
    </style:style>
    <style:style style:name="T100" style:family="text">
      <style:text-properties fo:font-size="7.5pt" fo:letter-spacing="-0.0071in" style:font-size-asian="7.5pt"/>
    </style:style>
    <style:style style:name="T101" style:family="text">
      <style:text-properties fo:font-size="7.5pt" fo:letter-spacing="-0.0063in" style:font-size-asian="7.5pt"/>
    </style:style>
    <style:style style:name="T102" style:family="text">
      <style:text-properties style:text-position="25% 100%" fo:font-size="8pt" fo:letter-spacing="-0.0016in" style:font-size-asian="8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1817*" fo:start-indent="0in" fo:end-indent="1.4799in"/>
          <style:column style:rel-width="33718*" fo:start-indent="1.4799in" fo:end-indent="0in"/>
        </style:columns>
      </style:section-properties>
    </style:style>
    <style:style style:name="Sect3" style:family="section">
      <style:section-properties text:dont-balance-text-columns="true" style:editable="false">
        <style:columns fo:column-count="2">
          <style:column style:rel-width="31452*" fo:start-indent="0in" fo:end-indent="0.039in"/>
          <style:column style:rel-width="34083*" fo:start-indent="0.039in" fo:end-indent="0in"/>
        </style:columns>
      </style:section-properties>
    </style:style>
    <style:style style:name="Sect4" style:family="section">
      <style:section-properties text:dont-balance-text-columns="true" style:editable="false">
        <style:columns fo:column-count="2">
          <style:column style:rel-width="31524*" fo:start-indent="0in" fo:end-indent="0.0307in"/>
          <style:column style:rel-width="34011*" fo:start-indent="0.0307in" fo:end-indent="0in"/>
        </style:columns>
      </style:section-properties>
    </style:style>
    <style:style style:name="Sect5" style:family="section">
      <style:section-properties style:editable="false">
        <style:columns fo:column-count="2">
          <style:column style:rel-width="31545*" fo:start-indent="0in" fo:end-indent="0.0283in"/>
          <style:column style:rel-width="33990*" fo:start-indent="0.0283in" fo:end-indent="0in"/>
        </style:columns>
      </style:section-properties>
    </style:style>
    <style:style style:name="Sect6" style:family="section">
      <style:section-properties text:dont-balance-text-columns="true" style:editable="false">
        <style:columns fo:column-count="6">
          <style:column style:rel-width="8852*" fo:start-indent="0in" fo:end-indent="0.0138in"/>
          <style:column style:rel-width="3340*" fo:start-indent="0.0138in" fo:end-indent="0.0134in"/>
          <style:column style:rel-width="3492*" fo:start-indent="0.0134in" fo:end-indent="0.0134in"/>
          <style:column style:rel-width="4378*" fo:start-indent="0.0134in" fo:end-indent="0.0138in"/>
          <style:column style:rel-width="13165*" fo:start-indent="0.0138in" fo:end-indent="0.2181in"/>
          <style:column style:rel-width="32308*" fo:start-indent="0.2181in" fo:end-indent="0in"/>
        </style:columns>
      </style:section-properties>
    </style:style>
    <style:style style:name="Sect7" style:family="section">
      <style:section-properties style:editable="false">
        <style:columns fo:column-count="2">
          <style:column style:rel-width="31460*" fo:start-indent="0in" fo:end-indent="0.039in"/>
          <style:column style:rel-width="34075*" fo:start-indent="0.039in" fo:end-indent="0in"/>
        </style:columns>
      </style:section-properties>
    </style:style>
    <style:style style:name="Sect8" style:family="section">
      <style:section-properties style:editable="false">
        <style:columns fo:column-count="3">
          <style:column style:rel-width="29690*" fo:start-indent="0in" fo:end-indent="0.0138in"/>
          <style:column style:rel-width="4574*" fo:start-indent="0.0138in" fo:end-indent="0.0134in"/>
          <style:column style:rel-width="31271*" fo:start-indent="0.0134in" fo:end-indent="0in"/>
        </style:columns>
      </style:section-properties>
    </style:style>
    <style:style style:name="Sect9" style:family="section">
      <style:section-properties style:editable="false">
        <style:columns fo:column-count="2">
          <style:column style:rel-width="30943*" fo:start-indent="0in" fo:end-indent="0.0138in"/>
          <style:column style:rel-width="34592*" fo:start-indent="0.013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6"><text:bookmark text:name="To overcome the bottlenecks inherent in "/><text:bookmark text:name="C. Research Contribution"/><text:bookmark text:name="Even though modern methods show encourag"/><text:bookmark text:name="B. Problem Statment"/><text:bookmark text:name="times during complex penetration testing"/><text:bookmark text:name="detection by modern Web Application Fire"/><text:bookmark text:name="Web applications are widely used by mode"/><text:bookmark text:name="A.B"/><text:bookmark text:name="I."/><text:bookmark text:name="while remaining practical for consumer-g"/><text:bookmark text:name="Abstract—Even with all the tools we have"/><text:bookmark text:name="hazirah.bee@city.edu.my"/><text:bookmark text:name="KualaLumpur, Malaysia"/><text:bookmark text:name="Dr. Hazirah Bee Binti Yusof Ali"/><text:bookmark text:name="KualaLumpur, Malaysia Wafa@cityuniversit"/><text:bookmark text:name="City UniversityMalaysia"/><text:bookmark text:name="Faculty of InformationTechnology"/><text:bookmark text:name="1st Wafa(Nourizadeh Seyedehfatemeh)"/><text:bookmark text:name="Constraints"/><text:bookmark text:name="SQLiRLLM: A Multi-Tier AI Framework for "/>SQLiRLLM:<text:span text:style-name="T1"> </text:span>A<text:span text:style-name="T1"> </text:span>Multi-Tier<text:span text:style-name="T1"> </text:span>AI<text:span text:style-name="T1"> </text:span>Framework<text:span text:style-name="T1"> </text:span>for Adaptive SQL Injection Testing with Ethical</text:p>
        <text:p text:style-name="P147"><text:span text:style-name="T2">Constraints</text:span></text:p>
        <text:p text:style-name="P88" loext:marker-style-name="T3"/>
        <text:p text:style-name="P89" loext:marker-style-name="T3"/>
      </text:section>
      <text:section text:style-name="Sect2" text:name="Section1">
        <text:p text:style-name="P37" loext:marker-style-name="T23"><text:span text:style-name="T23">1</text:span><text:span text:style-name="T30">st</text:span><text:span text:style-name="T31"> </text:span><text:span text:style-name="T32">Wafa(Nourizadeh</text:span><text:span text:style-name="T31"> </text:span><text:span text:style-name="T32">Seyedehfatemeh) </text:span><text:span text:style-name="T33">Faculty of InformationTechnology</text:span><text:span text:style-name="T34"> </text:span><text:span text:style-name="T33">City UniversityMalaysia</text:span><text:span text:style-name="T35"> </text:span><text:span text:style-name="T32">KualaLumpur, Malaysia </text:span><text:a xlink:type="simple" xlink:href="mailto:Wafa@cityuniversity.edu.my" text:style-name="ListLabel_20_64" text:visited-style-name="ListLabel_20_64"><text:span text:style-name="T36">Wafa@cityuniversity.edu.my</text:span></text:a></text:p>
        <text:p text:style-name="P41" loext:marker-style-name="T23"><text:span text:style-name="T23">Dr. Hazirah Bee Binti Yusof Ali </text:span><text:span text:style-name="T24">Faculty</text:span><text:span text:style-name="T26"> </text:span><text:span text:style-name="T24">of</text:span><text:span text:style-name="T26"> </text:span><text:span text:style-name="T24">InformationTechnology City UniversityMalaysia </text:span><text:span text:style-name="T23">KualaLumpur, Malaysia </text:span><text:a xlink:type="simple" xlink:href="mailto:hazirah.bee@city.edu.my" text:style-name="ListLabel_20_65" text:visited-style-name="ListLabel_20_65"><text:span text:style-name="T27">hazirah.bee@city.edu.my</text:span></text:a></text:p>
      </text:section>
      <text:section text:style-name="Sect1" text:name="Section2">
        <text:p text:style-name="P88" loext:marker-style-name="T3"/>
        <text:p text:style-name="P88" loext:marker-style-name="T3"/>
        <text:p text:style-name="P90" loext:marker-style-name="T3"/>
      </text:section>
      <text:section text:style-name="Sect3" text:name="Section3">
        <text:p text:style-name="P43" loext:marker-style-name="T39"><text:span text:style-name="T37">Abstract</text:span><text:span text:style-name="T38">—</text:span><text:span text:style-name="T39">Even with all the tools we have today, SQL Injection is still a primary vulnerability just as it has been for decades. Many traditional penetration testing tools rely on static, rule-based heuristics, which can limit their effectiveness when testing modern web frameworks with complex input validation. This study proposes SQLiRLLM, an AI-assisted framework that separates the penetration testing process into three functional layers. The framework combines Q-Learning for high-level strategy selection with</text:span><text:span text:style-name="T40"> </text:span><text:span text:style-name="T39">a fine-tuned Phi-3 Mini model for payload generation. This design aims to improve adaptability compared to purely static testing approaches.Furthermore, the framework employs “Qwen2.5-Coder-14B for post execution analysis, optimizing the trade-off between computational overhead and detection accuracy. The framework is designed to explore whether task decomposition and ethical constraints can improve vulnerability detection</text:span></text:p>
        <text:p text:style-name="P99">while<text:span text:style-name="T46"> </text:span>remaining<text:span text:style-name="T46"> </text:span>practical for<text:span text:style-name="T46"> </text:span>consumer-<text:span text:style-name="T2">grade</text:span></text:p>
        <text:p text:style-name="P46" loext:marker-style-name="T25"><text:span text:style-name="T25">Keywords—SQL</text:span><text:span text:style-name="T29"> </text:span><text:span text:style-name="T25">Injection, Reinforcement</text:span><text:span text:style-name="T29"> </text:span><text:span text:style-name="T28">Learning,</text:span></text:p>
        <text:p text:style-name="P47" loext:marker-style-name="T25"><text:span text:style-name="T25">Q-LearningA,</text:span><text:span text:style-name="T29"> </text:span><text:span text:style-name="T25">Ethical</text:span><text:span text:style-name="T29"> </text:span><text:span text:style-name="T25">AI Penetration</text:span><text:span text:style-name="T29"> </text:span><text:span text:style-name="T25">Testing, </text:span><text:span text:style-name="T28">Cybersecurity.</text:span></text:p>
        <text:p text:style-name="P100" loext:marker-style-name="T25"/>
        <text:p text:style-name="P101" loext:marker-style-name="T25"/>
        <text:list xml:id="list3043127204" text:style-name="WWNum1">
          <text:list-item>
            <text:p text:style-name="P7" loext:marker-style-name="T3"><text:span text:style-name="T47">INTRODUCTION</text:span></text:p>
          </text:list-item>
        </text:list>
        <text:list text:style-name="WWNum2">
          <text:list-item>
            <text:p text:style-name="P8" loext:marker-style-name="T52"><text:span text:style-name="T48">Background</text:span><text:span text:style-name="T49"> </text:span><text:span text:style-name="T48">and</text:span><text:span text:style-name="T50"> </text:span><text:span text:style-name="T51">motivation</text:span></text:p>
          </text:list-item>
        </text:list>
        <text:p text:style-name="P102">Web applications are widely used by modern organizations, which has increased the overall attack surface. Among these threats, SQL Injection (SQLi) is still a security risk that has been around for a long time, appearing often in the OWASP Top 10 for more than twenty years. Even though there are strong defenses that now exist, such as the prepared statements and Object-Relational Mapping (ORM) frameworks, SQLi issues continue to come up due to legacy systems being commonly used. Also, vulnerable third-party libraries, and misconfigurations commonly found in cloud native environments. Security tools that are very widely used, including open source solutions like SQLMap and commercial platforms such as Burp Suite, mostly depend on static, signature based detection methods.. These platforms typically execute hardcoded payload sequences and utilize pattern matching to interpret database responses. While effective against basic flaws, this methodology exhibits three critical bottlenecks: (1) an inability to adapt to application-specific business logic, (2) a lack of semantic awareness regarding stateful application behavior, and (3) a high susceptibility to</text:p>
        <text:p text:style-name="P104">detection by modern Web Application Firewalls (WAFs) that flag known static signatures [2].</text:p>
        <text:p text:style-name="P120">To help solve and come up with a solution, recent literature has shifted toward autonomous, learning-based approaches. Guan et al. [3] demonstrated the efficacy of Soft Actor<text:span text:style-name="T53">-</text:span>Critic (SAC) reinforcement learning in SSQLi, achieving bypass rates of 97.39% against black-box detectors. Similarly,<text:span text:style-name="T54"> </text:span>Leung et al. [4] introduced XPLOITSQL, pioneering the integration of LLMs with Reinforcement Learning (RL) to navigate commercial WAF defenses. Further advancing the field, Li et al. [5] utilized partially observable RL models in their EPPTA framework, significantly reducing convergence</text:p>
        <text:p text:style-name="P124">times<text:span text:style-name="T46"> </text:span>during complex<text:span text:style-name="T46"> </text:span>penetration testing <text:span text:style-name="T2">tasks.</text:span></text:p>
        <text:list text:continue-numbering="true" text:style-name="WWNum2">
          <text:list-item>
            <text:h text:style-name="P1" text:outline-level="2">Problem<text:span text:style-name="T55"> </text:span><text:span text:style-name="T2">Statment</text:span></text:h>
          </text:list-item>
        </text:list>
        <text:p text:style-name="P116">Even though modern methods show encouraging performance, very large barriers in terms of operations still slow their use in <text:span text:style-name="T56">real</text:span></text:p>
        <text:p text:style-name="P125">world <text:span text:style-name="T2">settings.</text:span></text:p>
        <text:list text:continue-numbering="true" text:style-name="WWNum2">
          <text:list-item>
            <text:list>
              <text:list-item>
                <text:p text:style-name="P14" loext:marker-style-name="T38"><text:span text:style-name="T38">The Efficiency Dilemma: Modern frameworks usually force a compromise, either using computationally intense architecture (examples: the 77M-parameter T5 model in XPLOITSQL) or opting for less computationally heavy reinfocement learning methods like SSQLi that do not have the semantic depth needed to avoid modern filtering </text:span><text:span text:style-name="T41">mechanisms.</text:span></text:p>
              </text:list-item>
              <text:list-item>
                <text:p text:style-name="P18" loext:marker-style-name="T38"><text:span text:style-name="T38">The Lack of Ethical Guardrailes: A clear issue </text:span><text:span text:style-name="T41">remains</text:span></text:p>
              </text:list-item>
            </text:list>
          </text:list-item>
        </text:list>
        <text:p text:style-name="P107">around authorizations. Most RL-based methods rely on attack success metrics while failing to embed the explicit ethical parameters and verification controls needed for professional Red Team engagements.</text:p>
        <text:list text:continue-numbering="true" text:style-name="WWNum2">
          <text:list-item>
            <text:list>
              <text:list-item>
                <text:p text:style-name="P19" loext:marker-style-name="T38"><text:span text:style-name="T38">Architectural limits: When depending on single-tier, single model framworks, this prevents the effective use of complementary AI paradigms. This results in resource utilization that is not optimal when complex tasks are</text:span><text:span text:style-name="T38"/></text:p>
              </text:list-item>
            </text:list>
          </text:list-item>
        </text:list>
        <text:p text:style-name="P127"/>
        <text:p text:style-name="P128"/>
        <text:list text:continue-numbering="true" text:style-name="WWNum2">
          <text:list-item>
            <text:h text:style-name="P2" text:outline-level="2">Research<text:span text:style-name="T1"> </text:span><text:span text:style-name="T2">Contribution</text:span></text:h>
          </text:list-item>
        </text:list>
        <text:p text:style-name="P117">To overcome the bottlenecks inherent in current methodologies, we introduce SQLiRLLM, a framework designed to solve and enhance computational efficiency and semantic precision. Our approach addresses the existing literature's limitations through<text:span text:style-name="T54"> </text:span>the following core contributions:</text:p>
        <text:list text:continue-numbering="true" text:style-name="WWNum2">
          <text:list-item>
            <text:list>
              <text:list-item>
                <text:p text:style-name="P9" loext:marker-style-name="T38"><text:span text:style-name="T38">Decomposed</text:span><text:span text:style-name="T42"> </text:span><text:span text:style-name="T38">Multi-Tier Architecture:</text:span><text:span text:style-name="T42"> </text:span><text:span text:style-name="T38">Instead of </text:span><text:span text:style-name="T41">relying</text:span></text:p>
              </text:list-item>
            </text:list>
          </text:list-item>
        </text:list>
        <text:p text:style-name="P108">on a monolithic model, SQLiRLLM strategically distributes<text:span text:style-name="T46"> </text:span>testing<text:span text:style-name="T46"> </text:span>subtasks<text:span text:style-name="T46"> </text:span>across<text:span text:style-name="T46"> </text:span>three<text:span text:style-name="T46"> </text:span>specialized</text:p>
      </text:section>
      <text:section text:style-name="Sect4" text:name="Section4">
        <text:p text:style-name="P109"><text:bookmark text:name="II. RELATED WORK"/>components. This modularity is intended to support each phase of the penetration test. From strategy to payload execution handled by an engine optimized for that specific objective.</text:p>
        <text:list text:continue-numbering="true" text:style-name="WWNum2">
          <text:list-item>
            <text:list>
              <text:list-item>
                <text:p text:style-name="P15" loext:marker-style-name="T38"><text:span text:style-name="T38">Scalable Computational Efficiency: By deploying models of varying scales for different sub-tasks, the framework optimizes resource utilization. This tiered deployment allows the system to maintain high performance on</text:span><text:span text:style-name="T43"> </text:span><text:span text:style-name="T38">standard hardware without the prohibitive overhead typically associated with large-scale LLMs.</text:span></text:p>
              </text:list-item>
              <text:list-item>
                <text:p text:style-name="P16" loext:marker-style-name="T38"><text:span text:style-name="T38">Semantic Depth via PEFT: We utilize parameter-efficient fine-tuning</text:span><text:span text:style-name="T44"> </text:span><text:span text:style-name="T38">(PEFT)</text:span><text:span text:style-name="T44"> </text:span><text:span text:style-name="T38">on</text:span><text:span text:style-name="T44"> </text:span><text:span text:style-name="T38">strategic</text:span><text:span text:style-name="T44"> </text:span><text:span text:style-name="T38">language</text:span><text:span text:style-name="T44"> </text:span><text:span text:style-name="T38">models</text:span><text:span text:style-name="T44"> </text:span><text:span text:style-name="T38">to achieve the high degree of semantic sophistication</text:span></text:p>
              </text:list-item>
            </text:list>
          </text:list-item>
        </text:list>
        <text:p text:style-name="P126">required<text:span text:style-name="T46"> </text:span>to bypass modern,<text:span text:style-name="T46"> </text:span>context-aware security <text:span text:style-name="T2">filters.</text:span></text:p>
        <text:list text:continue-numbering="true" text:style-name="WWNum2">
          <text:list-item>
            <text:list>
              <text:list-item>
                <text:p text:style-name="P20" loext:marker-style-name="T38"><text:span text:style-name="T38">Embedded Ethical Constraints: Unlike prior RL-based systems that prioritize raw bypass rates, SQLiRLLM integrates an ethical framework directly into the RL reward structure. This ensures full compliance with authorization protocols, making it a viable tool for professional Red Team environments.</text:span><text:span text:style-name="T38"/></text:p>
              </text:list-item>
            </text:list>
          </text:list-item>
        </text:list>
        <text:p text:style-name="P127"/>
        <text:p text:style-name="P127"/>
        <text:p text:style-name="P129"/>
        <text:p text:style-name="P110">Section II provides a critical review of related work in automated security and AI. Section III details the SQLiRLLM architectural design and implementation. Section IV evaluates the framework's potential applications and preliminary results, and Section V concludes with a discussion on future research <text:span text:style-name="T2">trajectories.</text:span></text:p>
        <text:p text:style-name="P130"/>
        <text:list xml:id="list154114189916885" text:continue-list="list3043127204" text:style-name="WWNum1">
          <text:list-item>
            <text:p text:style-name="P11" loext:marker-style-name="T3"><text:span text:style-name="T3">RELATED</text:span><text:span text:style-name="T4"> </text:span><text:span text:style-name="T5">WORK</text:span></text:p>
          </text:list-item>
        </text:list>
        <text:list text:style-name="WWNum3">
          <text:list-item>
            <text:h text:style-name="P3" text:outline-level="2">Traditional<text:span text:style-name="T1"> </text:span>SQL<text:span text:style-name="T1"> </text:span>Injection<text:span text:style-name="T55"> </text:span><text:span text:style-name="T2">Testing</text:span></text:h>
          </text:list-item>
        </text:list>
        <text:p text:style-name="P96" loext:marker-style-name="T6"/>
        <text:p text:style-name="P121">Automated SQL injection testing has remained a primary focus of security research for over two decades. At the forefront of this field is SQLMap [6], an open-source benchmark that utilizes a robust payload database to detect a wide array of injection vectors, including UNION-based, error-based, and various blind injection techniques across multiple RDBMS platforms. Commercially, platforms like Burp Suite Professional and Acunetix deliver robust features, combining smart web crawling with advanced session handling ability.</text:p>
        <text:p text:style-name="P111">However, even with many adopting these platforms, these tools are still constrained by their dependence on static, rule driven architecture. Operating on pre-determined payload patterns,<text:span text:style-name="T54"> </text:span>they struggle to bypass application specific sanitization<text:span text:style-name="T57"> </text:span>methods very often, and they can also interpret the underlying semantic context of comtemporary web responses. Also, Static Application Security Testing (SAST) pipelines, are important during early development steps, they usually are not as<text:span text:style-name="T57"> </text:span>effective as they could be due to a high rate of false-positive rates. These systems usually don't have enough visibility to accurately track complex data flows across distributed, modern architectures, creating an issue that can hide legitimate vulnerabilities. This disconnection between static automation and adaptive application behavior shows the need for more dynamic penetration testing frameworks that are context-aware.</text:p>
        <text:p text:style-name="P127"/>
        <text:p text:style-name="P131"/>
        <text:list text:continue-numbering="true" text:style-name="WWNum3">
          <text:list-item>
            <text:h text:style-name="P4" text:outline-level="2">Using<text:span text:style-name="T55"> </text:span>Reinforcement<text:span text:style-name="T55"> </text:span>Learning<text:span text:style-name="T55"> </text:span>in<text:span text:style-name="T55"> </text:span><text:span text:style-name="T2">Cybersecurity</text:span></text:h>
          </text:list-item>
        </text:list>
        <text:p text:style-name="P97" loext:marker-style-name="T6"/>
        <text:p text:style-name="P119">Recent trends in cybersecurity have seen an increased pivot <text:span text:style-name="T2">toward</text:span></text:p>
        <text:p text:style-name="P118">Reinforcement Learning (RL), driven by its inherent proficiency in modeling sequential decision-making within highly dynamic environments [9]. The literature reveals a careful selection of RL algorithms based on specific operational trade-offs: Proximal Policy Optimization (PPO) is frequently</text:p>
        <text:p text:style-name="P135">favored<text:span text:style-name="T46"> </text:span>for its stability<text:span text:style-name="T46"> </text:span>during complex policy<text:span text:style-name="T46"> </text:span>updates, <text:span text:style-name="T2">while</text:span></text:p>
        <text:p text:style-name="P112">Soft Actor-Critic (SAC) is utilized for its entropy-<text:span text:style-name="T54"> </text:span>regularization properties, which prevent premature convergence by incentivizing a broader search of the action space.</text:p>
        <text:p text:style-name="P136">Conversely,<text:span text:style-name="T46"> </text:span>Q-Learning remains a staple for <text:span text:style-name="T2">researchers</text:span></text:p>
        <text:p text:style-name="P105">prioritizing interpretability and low computational overhead <text:span text:style-name="T2">[10].</text:span></text:p>
        <text:p text:style-name="P137">A notable implementation<text:span text:style-name="T58"> </text:span>is the<text:span text:style-name="T58"> </text:span>EPPTA framework<text:span text:style-name="T58"> </text:span>by Li<text:span text:style-name="T58"> </text:span>et <text:span text:style-name="T59">al.</text:span></text:p>
        <text:p text:style-name="P122">[5], which employs PPO within a Partially Observable Markov Decision Process (POMDP). While their asynchronous architecture achieves a remarkable 20-fold improvement in convergence time, EPPTA is designed for generalized penetration testing. This generality results in a lack of specialized SQLi-specific logic and, crucially, misses the semantic nuances that only language model integration can <text:span text:style-name="T2">provide.</text:span></text:p>
        <text:p text:style-name="P138">Targeting<text:span text:style-name="T46"> </text:span>SQL injection specifically, Guan et<text:span text:style-name="T46"> </text:span>al. [3] <text:span text:style-name="T2">introduced</text:span></text:p>
        <text:p text:style-name="P123">SSQLi, opting for SAC to leverage its entropy-based exploration for generating diverse adversarial strategies. Their framework utilizes a sophisticated dual-vector state representation to map both attack intent and variation strategies across 14 stackable vectors.While SSQLi demonstrates a high degree of technical success—achieving bypass rates of 97.39% against modern WAFs—it remains limited by a purely<text:span text:style-name="T54"> </text:span>structural approach to payload generation. Without a deep semantic understanding of the target application's context or an embedded ethical framework, such systems remain more focused on adversarial evasion than responsible, context-aware security auditing.</text:p>
        <text:p text:style-name="P127"/>
        <text:p text:style-name="P127"/>
        <text:p text:style-name="P132"/>
        <text:list text:continue-numbering="true" text:style-name="WWNum3">
          <text:list-item>
            <text:h text:style-name="P5" text:outline-level="2">Language<text:span text:style-name="T1"> </text:span>Models<text:span text:style-name="T55"> </text:span>for<text:span text:style-name="T1"> </text:span>Security<text:span text:style-name="T55"> </text:span>Applications<text:span text:style-name="T55"> </text:span><text:span text:style-name="T2">Using</text:span></text:h>
          </text:list-item>
        </text:list>
        <text:p text:style-name="P98" loext:marker-style-name="T6"/>
        <text:p text:style-name="P113">The advent of Large Language Models (LLMs) has fundamentally shifted the baseline for Natural Language Processing, with profound implications for autonomous security applications [11].However, the sheer scale of these models introduces a "compute wall," where the substantial resource requirements often preclude their use in real-time or edge-case security environments. To mitigate this, Hu et al.</text:p>
        <text:p text:style-name="P139">[12] proposed Low-Rank<text:span text:style-name="T58"> </text:span>Adaptation (LoRA), a<text:span text:style-name="T58"> </text:span><text:span text:style-name="T2">parameter-</text:span></text:p>
        <text:p text:style-name="P106">efficient fine-tuning (PEFT) strategy that freezes the pre-<text:span text:style-name="T54"> </text:span>trained model weights and injects trainable low-rank matrices into the transformer layers. By reducing thenumber of trainable parameters by up to 99%, LoRA enables domain-specific optimization on a significantly smaller computational footprint, effectively democratizing high-tier LLM capabilities for specialized security tasks.</text:p>
        <text:p text:style-name="P138">Leveraging this intersection of LLMs and <text:span text:style-name="T2">Reinforcement</text:span></text:p>
        <text:p text:style-name="P140">Learning, Leung et al. [4] introduced XPLOITSQL. Their framework utilizes a 77M parameter T5 model that operates as both an actor and a critic, refined through Natural Language Policy Optimization (NLPO). While XPLOITSQL marked a significant milestone in bypassing commercial WAFs and ML- based detection systems, it remains constrained by two primary factors:<text:span text:style-name="T46"> </text:span>the substantial<text:span text:style-name="T46"> </text:span>GPU overhead required<text:span text:style-name="T46"> </text:span>for its dual-<text:span text:style-name="T56">role</text:span></text:p>
      </text:section>
      <text:section text:style-name="Sect5" text:name="Section5">
        <text:p text:style-name="P114"><text:bookmark text:name="SQLiRLLM"/><text:bookmark text:name="Limitation  Static,no adaptation No sema"/><text:bookmark text:name="Key Strength  Comprehensivepayloads 97.3"/><text:bookmark text:name="Ethical  Partial No No  Yes"/><text:bookmark text:name="LM No No T5 Multi"/><text:bookmark text:name="RL  No SAC AC  Q-L"/><text:bookmark text:name="Framework  SQLMap [13] SSQLi [3] XPLOITS"/><text:bookmark text:name="TABLE I"/><text:bookmark text:name="robust  deterministic  environments."/><text:bookmark text:name="structured"/><text:bookmark text:name="of"/><text:bookmark text:name="constraints"/><text:bookmark text:name="within"/><text:bookmark text:name="properties"/><text:bookmark text:name="convergence"/><text:bookmark text:name="and"/><text:bookmark text:name="balance"/><text:bookmark text:name="exploration-exploitation"/><text:bookmark text:name="agent’s"/><text:bookmark text:name="As illustrated in the framework’s schema"/><text:bookmark text:name="TESTING STRATEGIES"/><text:bookmark text:name="Fig.1 SQLiRLLM architecture illustrating"/><text:bookmark text:name="The architecture of SQLiRLLM is engineer"/><text:bookmark text:name="III. METHODOLOGY"/><text:bookmark text:name="Table I summarizes the comparative analy"/><text:bookmark text:name="D. Research Gap Analysis"/><text:bookmark text:name="architecture and a lack of integrated et"/>architecture and a lack of integrated ethical parameters. These limitations highlight a critical research gap: the need for a framework that balances high-fidelity semantic understanding with a modular, resource-efficient, and ethically-constrained <text:span text:style-name="T2">design.</text:span></text:p>
        <text:p text:style-name="P127"/>
        <text:p text:style-name="P133"/>
        <text:list text:continue-numbering="true" text:style-name="WWNum3">
          <text:list-item>
            <text:h text:style-name="P6" text:outline-level="2">Research<text:span text:style-name="T59"> </text:span>Gap<text:span text:style-name="T56"> </text:span><text:span text:style-name="T2">Analysis</text:span></text:h>
          </text:list-item>
        </text:list>
        <text:p text:style-name="P98" loext:marker-style-name="T6"/>
        <text:p text:style-name="P111">Table I summarizes the comparative analysis of existing frameworks, revealing that no current solution achieves computational efficiency, semantic sophistication, ethical compli- ance, and practical deployability together. This gap motivates SQLiRLLM’s development, combining<text:span text:style-name="T54"> </text:span>computational effi-ciency through strategic task decomposition, semantic sophis-tication through appropriate language model integration, and ethical compliance through integrated<text:span text:style-name="T54"> </text:span>constraint mechanisms.</text:p>
        <text:p text:style-name="P127"/>
        <text:p text:style-name="P134"/>
        <text:list text:continue-list="list154114189916885" text:style-name="WWNum1">
          <text:list-item>
            <text:p text:style-name="P12" loext:marker-style-name="T3"><text:span text:style-name="T7">METHODOLOGY</text:span><text:span text:style-name="T7"/></text:p>
          </text:list-item>
        </text:list>
        <text:p text:style-name="P115">The architecture of SQLiRLLM is engineered to solve the consistent push-pull fight between high-fidelity semantic analysis and computational resource constraints, all while embedding ethical safeguards directly into the operational workflow. Figure 1 shows a summrized schematic of the integrated framework. The workflow is organize into main foundational steps. Target Definition and Scoping: during the first step, the operator determines the environment and clearly provides the scope of the security assessment. This scoping process makes sure that automated discovery and analysis operate within the aforementioned parameters. This avoids unauthorized access, unintended lateral exploration, or evaluation of systms outside the defined audit.</text:p>
        <text:list text:style-name="WWNum4">
          <text:list-item>
            <text:p text:style-name="P10" loext:marker-style-name="T38"><text:span text:style-name="T38">Hyperparameter</text:span><text:span text:style-name="T42"> </text:span><text:span text:style-name="T38">Calibration: The system is</text:span><text:span text:style-name="T42"> </text:span><text:span text:style-name="T38">prepared </text:span><text:span text:style-name="T45">by</text:span></text:p>
          </text:list-item>
        </text:list>
        <text:p text:style-name="P103">setting important hyperparameters before runtime. before this step, The operator changes the RL agent's exploration/exploitation prioritizations and the LLM's temperature values. This shapes the framework's response to match the complexity of the target database.</text:p>
        <text:list text:continue-numbering="true" text:style-name="WWNum4">
          <text:list-item>
            <text:p text:style-name="P17" loext:marker-style-name="T38"><text:span text:style-name="T38">The Strategic Planning Layer (Q-Learning): Core to the framework's decision making is the Strategic Planning Layer, which uses tabular Q-learning. By making the penetration test a sequential decision making task, this layer governs the core strategy. It decides which injection categories to be most important based on observed responses from the target application.</text:span><text:span text:style-name="T38"/></text:p>
          </text:list-item>
        </text:list>
        <text:p text:style-name="P54" loext:marker-style-name="T60"/>
        <text:p text:style-name="P141" loext:marker-style-name="T3"><draw:frame draw:style-name="fr3" draw:name="Image 1" text:anchor-type="as-char" svg:width="3.3047in" svg:height="1.778in" draw:z-index="1"><draw:image xlink:href="Pictures/10000000000001F0000000EDE213842A.jpg" xlink:type="simple" xlink:show="embed" xlink:actuate="onLoad" draw:mime-type="image/jpeg"/></draw:frame></text:p>
        <text:p text:style-name="P142" loext:marker-style-name="T61"/>
        <text:p text:style-name="P38" loext:marker-style-name="T61"><text:span text:style-name="T61">Fig.1</text:span><text:span text:style-name="T62"> </text:span><text:span text:style-name="T61">SQLiRLLM</text:span><text:span text:style-name="T62"> </text:span><text:span text:style-name="T61">architecture</text:span><text:span text:style-name="T62"> </text:span><text:span text:style-name="T61">illustrating</text:span><text:span text:style-name="T62"> </text:span><text:span text:style-name="T61">Strategic</text:span><text:span text:style-name="T62"> </text:span><text:span text:style-name="T61">planning,</text:span><text:span text:style-name="T62"> </text:span><text:span text:style-name="T61">Payload</text:span><text:span text:style-name="T63"> </text:span><text:span text:style-name="T61">generation with ethical enforcement, and analysis feedback loop.</text:span></text:p>
        <text:p text:style-name="P143" loext:marker-style-name="T61"/>
        <text:p text:style-name="P48" loext:marker-style-name="T3"><text:span text:style-name="T3">TESTING</text:span><text:span text:style-name="T4"> </text:span><text:span text:style-name="T7">STRATEGIES</text:span></text:p>
        <text:p text:style-name="P55" loext:marker-style-name="T3"><text:span text:style-name="T3">As illustrated in the framework’s schematic, the process begins with Target Definition and Scoping, where the operator establishes the boundaries of the security audit. This phase ensures that automated discovery mechanisms remain within authorized logical domains, preventing unintended lateral movement. This is followed by Hyper</text:span><text:span text:style-name="T9">-</text:span><text:span text:style-name="T3">parameter Optimization, allowing for the fine-tuning of the RL</text:span></text:p>
        <text:p text:style-name="P60" loext:marker-style-name="T3"><text:span text:style-name="T74">t</text:span><text:span text:style-name="T3">a</text:span><text:span text:style-name="T74">h</text:span><text:span text:style-name="T3">g</text:span><text:span text:style-name="T74">e</text:span><text:span text:style-name="T3">ent’s</text:span><text:span text:style-name="T10"> </text:span><text:span text:style-name="T3">exploration-exploitation</text:span><text:span text:style-name="T11"> </text:span><text:span text:style-name="T3">balance</text:span><text:span text:style-name="T10"> </text:span><text:span text:style-name="T3">and LLM’s temperature settings to suit the specific database</text:span><text:span text:style-name="T13"> </text:span><text:span text:style-name="T3">architecture</text:span><text:span text:style-name="T13"> </text:span><text:span text:style-name="T3">under</text:span><text:span text:style-name="T13"> </text:span><text:span text:style-name="T3">test.</text:span><text:span text:style-name="T13"> </text:span><text:span text:style-name="T3">The</text:span><text:span text:style-name="T13"> </text:span><text:span text:style-name="T3">Strategic</text:span></text:p>
        <text:p text:style-name="P61" loext:marker-style-name="T9"><text:span text:style-name="T3">Planning</text:span><text:span text:style-name="T4"> </text:span><text:span text:style-name="T3">Layer</text:span><text:span text:style-name="T4"> </text:span><text:span text:style-name="T9">(</text:span><text:span text:style-name="T3">Tabular</text:span><text:span text:style-name="T14"> </text:span><text:span text:style-name="T3">Q</text:span><text:span text:style-name="T9">-</text:span><text:span text:style-name="T7">Learning</text:span><text:span text:style-name="T8">)</text:span></text:p>
        <text:p text:style-name="P56" loext:marker-style-name="T3"><text:span text:style-name="T3">The decision-making backbone of the framework utilizes Tabular Q-Learning to determine high-level attack vectors. While deep reinforcement learning (DRL)</text:span><text:span text:style-name="T15"> </text:span><text:span text:style-name="T3">variants</text:span><text:span text:style-name="T15"> </text:span><text:span text:style-name="T3">like</text:span><text:span text:style-name="T15"> </text:span><text:span text:style-name="T3">PPO</text:span><text:span text:style-name="T15"> </text:span><text:span text:style-name="T3">or</text:span><text:span text:style-name="T15"> </text:span><text:span text:style-name="T3">SAC</text:span><text:span text:style-name="T15"> </text:span><text:span text:style-name="T3">are</text:span><text:span text:style-name="T15"> </text:span><text:span text:style-name="T3">common</text:span><text:span text:style-name="T15"> </text:span><text:span text:style-name="T3">in</text:span><text:span text:style-name="T15"> </text:span><text:span text:style-name="T3">high- dimensional robotics, a tabular approach was selected for three specific research advantages: first, the interpretability of a Q-table allows for transparent security auditing; second, the computational overhead is minimal, making the system viable for real-time scanning on standard hardware; and third, it provides </text:span><text:span text:style-name="T5">the</text:span></text:p>
        <text:p text:style-name="P63" loext:marker-style-name="T3"><text:span text:style-name="T16">r</text:span><text:span text:style-name="T75">S</text:span><text:span text:style-name="T17">o</text:span><text:span text:style-name="T76">Q</text:span><text:span text:style-name="T18">b</text:span><text:span text:style-name="T77">L</text:span><text:span text:style-name="T19">us</text:span><text:span text:style-name="T20">t</text:span><text:span text:style-name="T3"><text:tab/></text:span><text:span text:style-name="T7">convergence</text:span><text:span text:style-name="T3"><text:tab/></text:span><text:span text:style-name="T7">properties</text:span><text:span text:style-name="T3"><text:tab/></text:span><text:span text:style-name="T7">within</text:span></text:p>
        <text:p text:style-name="P64" loext:marker-style-name="T3"><text:span text:style-name="T78">deterministic</text:span><text:span text:style-name="T79"><text:tab/></text:span><text:span text:style-name="T7">constraints</text:span><text:span text:style-name="T3"><text:tab/></text:span><text:span text:style-name="T4">of</text:span><text:span text:style-name="T3"><text:tab/></text:span><text:span text:style-name="T7">structured environments.</text:span></text:p>
      </text:section>
      <text:section text:style-name="Sect1" text:name="Section6">
        <text:p text:style-name="P144" loext:marker-style-name="T61"/>
        <text:p text:style-name="P145" loext:marker-style-name="T61"/>
        <text:p text:style-name="P65" loext:marker-style-name="T61"><text:span text:style-name="T61">TABLE</text:span><text:span text:style-name="T64"> </text:span><text:span text:style-name="T65">I</text:span></text:p>
        <text:p text:style-name="P66" loext:marker-style-name="T87"><draw:frame draw:style-name="fr2" draw:name="Image 2" text:anchor-type="char" svg:x="0.5602in" svg:y="0.0965in" svg:width="5.9917in" svg:height="0.2709in" draw:z-index="0"><draw:image xlink:href="Pictures/100000010000070500000051951C7E95.png" xlink:type="simple" xlink:show="embed" xlink:actuate="onLoad" draw:mime-type="image/png"/></draw:frame><text:span text:style-name="T82">COMPARATIVE</text:span><text:span text:style-name="T83"> </text:span><text:span text:style-name="T82">ANALYSISOF</text:span><text:span text:style-name="T84"> </text:span><text:span text:style-name="T61">E</text:span><text:span text:style-name="T82">XISTING</text:span><text:span text:style-name="T85"> </text:span><text:span text:style-name="T86">FRAMEWORKS</text:span></text:p>
      </text:section>
      <text:section text:style-name="Sect6" text:name="Section7">
        <text:p text:style-name="P67" loext:marker-style-name="T90"><text:span text:style-name="T88">Framework</text:span><text:span text:style-name="T88"/></text:p>
        <text:p text:style-name="P70" loext:marker-style-name="T91"><text:span text:style-name="T91">SQLMap</text:span><text:span text:style-name="T92"> </text:span><text:span text:style-name="T93">[13]</text:span></text:p>
        <text:p text:style-name="P44" loext:marker-style-name="T91"><text:span text:style-name="T91">SSQL</text:span><text:a xlink:type="simple" xlink:href="#_bookmark0" text:style-name="ListLabel_20_66" text:visited-style-name="ListLabel_20_66"><text:span text:style-name="T91">i</text:span><text:span text:style-name="T94"> </text:span><text:span text:style-name="T91">[3]</text:span></text:a><text:span text:style-name="T96"> </text:span><text:span text:style-name="T89">XPLOITSQ</text:span><text:a xlink:type="simple" xlink:href="#_bookmark0" text:style-name="ListLabel_20_68" text:visited-style-name="ListLabel_20_68"><text:span text:style-name="T89">L[4]</text:span></text:a></text:p>
        <text:p text:style-name="P68" loext:marker-style-name="T90"><draw:frame draw:style-name="fr1" draw:name="Image 3" text:anchor-type="char" svg:x="0.5602in" svg:y="0.1154in" svg:width="5.9917in" svg:height="0.1457in" draw:z-index="2"><draw:image xlink:href="Pictures/1000000100000705000000291D879F7A.png" xlink:type="simple" xlink:show="embed" xlink:actuate="onLoad" draw:mime-type="image/png"/></draw:frame><text:span text:style-name="T88">SQLiRLLM</text:span><text:span text:style-name="T88"/></text:p>
        <text:p text:style-name="P49" loext:marker-style-name="T90"><text:span text:style-name="T98">RL</text:span><text:span text:style-name="T98"/></text:p>
        <text:p text:style-name="P40" loext:marker-style-name="T91"><text:span text:style-name="T92">No</text:span><text:span text:style-name="T96"> </text:span><text:span text:style-name="T93">SAC</text:span><text:span text:style-name="T96"> </text:span><text:span text:style-name="T92">AC</text:span><text:span text:style-name="T96"> </text:span><text:span text:style-name="T93">Q-L</text:span></text:p>
        <text:p text:style-name="P50" loext:marker-style-name="T90"><text:span text:style-name="T98">LM</text:span><text:span text:style-name="T98"/></text:p>
        <text:p text:style-name="P45" loext:marker-style-name="T91"><text:span text:style-name="T92">No</text:span><text:span text:style-name="T96"> </text:span><text:span text:style-name="T92">No</text:span><text:span text:style-name="T96"> </text:span><text:span text:style-name="T99">T5</text:span></text:p>
        <text:p text:style-name="P51" loext:marker-style-name="T91"><text:span text:style-name="T89">Multi</text:span><text:span text:style-name="T89"/></text:p>
        <text:p text:style-name="P57" loext:marker-style-name="T91"><text:span text:style-name="T88">Ethical</text:span><text:span text:style-name="T97"> </text:span><text:span text:style-name="T89">Partial</text:span><text:span text:style-name="T96"> </text:span><text:span text:style-name="T92">No</text:span></text:p>
        <text:p text:style-name="P42" loext:marker-style-name="T91"><text:span text:style-name="T92">No</text:span><text:span text:style-name="T96"> </text:span><text:span text:style-name="T99">Yes</text:span></text:p>
        <text:p text:style-name="P59" loext:marker-style-name="T91"><text:span text:style-name="T90">Key</text:span><text:span text:style-name="T95"> </text:span><text:span text:style-name="T90">Strength</text:span><text:span text:style-name="T97"> </text:span><text:span text:style-name="T89">Comprehensivepayloads</text:span><text:span text:style-name="T96"> </text:span><text:span text:style-name="T91">97.39% evasion rate</text:span><text:span text:style-name="T96"> </text:span><text:span text:style-name="T91">LLM+RL</text:span><text:span text:style-name="T94"> </text:span><text:span text:style-name="T91">integration</text:span><text:span text:style-name="T96"> </text:span><text:span text:style-name="T91">Multi-tier,</text:span><text:span text:style-name="T94"> </text:span><text:span text:style-name="T91">ethical</text:span></text:p>
        <text:p text:style-name="P69" loext:marker-style-name="T90"><text:span text:style-name="T88">Limitation</text:span><text:span text:style-name="T88"/></text:p>
        <text:p text:style-name="P71" loext:marker-style-name="T91"><text:span text:style-name="T91">Static,no</text:span><text:span text:style-name="T92"> </text:span><text:span text:style-name="T89">adaptation</text:span></text:p>
        <text:p text:style-name="P58" loext:marker-style-name="T91"><text:span text:style-name="T91">No</text:span><text:span text:style-name="T100"> </text:span><text:span text:style-name="T91">semantic</text:span><text:span text:style-name="T101"> </text:span><text:span text:style-name="T91">understanding</text:span><text:span text:style-name="T96"> </text:span><text:span text:style-name="T91">High computational cost</text:span><text:span text:style-name="T96"> </text:span><text:span text:style-name="T91">To be validated</text:span></text:p>
      </text:section>
      <text:section text:style-name="Sect7" text:name="Section8">
        <text:p text:style-name="P72" loext:marker-style-name="T3"><text:bookmark text:name="_bookmark0"/><text:bookmark text:name="In this equation, the Vulnerability Dete"/><text:bookmark text:name="where α = 0.6 represents the detection e"/><text:bookmark text:name="Finally the framework’s learning is gove"/><text:bookmark text:name="Recognizing"/><text:bookmark text:name="results."/><text:bookmark text:name="the"/><text:bookmark text:name="interpret"/><text:bookmark text:name="to"/><text:bookmark text:name="Coder-14B"/><text:bookmark text:name="the  computational cost of a 14B model, "/><text:bookmark text:name="execution of the attack, the Analysis La"/><text:bookmark text:name="Multi-Tiered Analysis and Reward Logic F"/><text:bookmark text:name="Training Dataset: A curated collection o"/><text:bookmark text:name="The generation process relies on the fol"/><text:bookmark text:name="specific fine-tuning on a single GPU wit"/><text:bookmark text:name="0.5% of the model parameters (19M), we e"/><text:bookmark text:name="Context-Aware Payload Generation (Phi-3 "/><text:bookmark text:name="State Space: Encodes critical applicatio"/><text:bookmark text:name="The layer operates based on a carefully "/><text:span text:style-name="T3">The</text:span><text:span text:style-name="T19"> </text:span><text:span text:style-name="T3">layer</text:span><text:span text:style-name="T19"> </text:span><text:span text:style-name="T3">operates</text:span><text:span text:style-name="T19"> </text:span><text:span text:style-name="T3">based</text:span><text:span text:style-name="T19"> </text:span><text:span text:style-name="T3">on</text:span><text:span text:style-name="T19"> </text:span><text:span text:style-name="T3">a</text:span><text:span text:style-name="T19"> </text:span><text:span text:style-name="T3">carefully</text:span><text:span text:style-name="T19"> </text:span><text:span text:style-name="T3">defined</text:span><text:span text:style-name="T19"> </text:span><text:span text:style-name="T3">state</text:span><text:span text:style-name="T19"> </text:span><text:span text:style-name="T3">and action space:</text:span></text:p>
        <text:p text:style-name="P91" loext:marker-style-name="T3"/>
        <text:list text:style-name="WWNum5">
          <text:list-item>
            <text:p text:style-name="P24" loext:marker-style-name="T3"><text:span text:style-name="T3">State Space: Encodes critical application characteristics including framework type (e.g., Laravel, Django), database system (MySQL, Oracle), the presence of WAFs, and the current testing</text:span><text:span text:style-name="T15"> </text:span><text:span text:style-name="T3">phase</text:span><text:span text:style-name="T15"> </text:span><text:span text:style-name="T3">(Initial,</text:span><text:span text:style-name="T15"> </text:span><text:span text:style-name="T3">Refinement,</text:span><text:span text:style-name="T15"> </text:span><text:span text:style-name="T3">Exploitation,</text:span><text:span text:style-name="T15"> </text:span><text:span text:style-name="T3">or </text:span><text:span text:style-name="T7">Verification).</text:span></text:p>
          </text:list-item>
          <text:list-item>
            <text:p text:style-name="P25" loext:marker-style-name="T3"><text:span text:style-name="T79">Action</text:span><text:span text:style-name="T80"> </text:span><text:span text:style-name="T79">Space:</text:span><text:span text:style-name="T81"> </text:span><text:span text:style-name="T79">Consists</text:span><text:span text:style-name="T81"> </text:span><text:span text:style-name="T79">of</text:span><text:span text:style-name="T80"> </text:span><text:span text:style-name="T79">six</text:span><text:span text:style-name="T81"> </text:span><text:span text:style-name="T79">primary</text:span><text:span text:style-name="T81"> </text:span><text:span text:style-name="T78">testing</text:span></text:p>
          </text:list-item>
        </text:list>
        <text:p text:style-name="P73" loext:marker-style-name="T3"><text:span text:style-name="T3">strategies:</text:span><text:span text:style-name="T7"> </text:span><text:span text:style-name="T3">UNION-based,</text:span><text:span text:style-name="T7"> </text:span><text:span text:style-name="T3">Error-based,</text:span><text:span text:style-name="T7"> </text:span><text:span text:style-name="T3">Boolean- based blind, Time-based blind, Stacked queries, and Second-order injection.</text:span></text:p>
        <text:p text:style-name="P92" loext:marker-style-name="T3"/>
        <text:p text:style-name="P76" loext:marker-style-name="T3"><text:span text:style-name="T3">Context-Aware Payload Generation (Phi-3 Mini + LoRA) Once a strategy is selected, the Payload Generation Layer invokes a Phi-3 Mini (3.8B) model. This model represents an optimal balance between capability and efficiency,</text:span><text:span text:style-name="T3"/></text:p>
        <text:p text:style-name="P75" loext:marker-style-name="T3"><text:span text:style-name="T3">demonstrating sophisticated semantic understanding while maintaining fast inference speeds. To specialize the model for the nuances of SQL syntax and evasion, we employed Low-Rank</text:span><text:span text:style-name="T4"> </text:span><text:span text:style-name="T3">Adaptation</text:span><text:span text:style-name="T4"> </text:span><text:span text:style-name="T3">(LoRA).</text:span><text:span text:style-name="T4"> </text:span><text:span text:style-name="T3">By</text:span><text:span text:style-name="T4"> </text:span><text:span text:style-name="T3">adapting</text:span><text:span text:style-name="T4"> </text:span><text:span text:style-name="T7">approximately</text:span></text:p>
        <text:p text:style-name="P77" loext:marker-style-name="T3"><text:span text:style-name="T3">0.5% of the model parameters (19M), we enabled domain- specific fine-tuning on a single GPU within an 8-hour </text:span><text:span text:style-name="T7">window.</text:span></text:p>
        <text:p text:style-name="P93" loext:marker-style-name="T3"/>
        <text:p text:style-name="P78" loext:marker-style-name="T3"><text:span text:style-name="T3">The</text:span><text:span text:style-name="T14"> </text:span><text:span text:style-name="T3">generation</text:span><text:span text:style-name="T14"> </text:span><text:span text:style-name="T3">process</text:span><text:span text:style-name="T14"> </text:span><text:span text:style-name="T3">relies</text:span><text:span text:style-name="T5"> </text:span><text:span text:style-name="T3">on</text:span><text:span text:style-name="T14"> </text:span><text:span text:style-name="T3">the</text:span><text:span text:style-name="T14"> </text:span><text:span text:style-name="T3">following</text:span><text:span text:style-name="T5"> </text:span><text:span text:style-name="T7">components:</text:span></text:p>
        <text:p text:style-name="P79" loext:marker-style-name="T3"><text:span text:style-name="T3">In this equation, the Vulnerability Detection Rate (VDR) and Ethical</text:span><text:span text:style-name="T11"> </text:span><text:span text:style-name="T3">Safeguard</text:span><text:span text:style-name="T11"> </text:span><text:span text:style-name="T3">Rating</text:span><text:span text:style-name="T11"> </text:span><text:span text:style-name="T3">(ESR)</text:span><text:span text:style-name="T11"> </text:span><text:span text:style-name="T3">are</text:span><text:span text:style-name="T11"> </text:span><text:span text:style-name="T3">the</text:span><text:span text:style-name="T11"> </text:span><text:span text:style-name="T3">primary</text:span><text:span text:style-name="T11"> </text:span><text:span text:style-name="T3">drivers. Notably,</text:span><text:span text:style-name="T11"> </text:span><text:span text:style-name="T3">any</text:span><text:span text:style-name="T11"> </text:span><text:span text:style-name="T3">ethical</text:span><text:span text:style-name="T11"> </text:span><text:span text:style-name="T3">violation</text:span><text:span text:style-name="T11"> </text:span><text:span text:style-name="T3">triggers</text:span><text:span text:style-name="T11"> </text:span><text:span text:style-name="T3">a</text:span><text:span text:style-name="T11"> </text:span><text:span text:style-name="T3">severe</text:span><text:span text:style-name="T11"> </text:span><text:span text:style-name="T3">negative</text:span><text:span text:style-name="T11"> </text:span><text:span text:style-name="T3">reward</text:span><text:span text:style-name="T12"> </text:span><text:span text:style-name="T3">of</text:span><text:span text:style-name="T12"> </text:span><text:span text:style-name="T3">-100.</text:span><text:span text:style-name="T12"> </text:span><text:span text:style-name="T3">This</text:span><text:span text:style-name="T12"> </text:span><text:span text:style-name="T3">feedback</text:span><text:span text:style-name="T12"> </text:span><text:span text:style-name="T3">loop</text:span><text:span text:style-name="T12"> </text:span><text:span text:style-name="T3">ensures</text:span><text:span text:style-name="T12"> </text:span><text:span text:style-name="T3">that</text:span><text:span text:style-name="T12"> </text:span><text:span text:style-name="T3">the</text:span><text:span text:style-name="T11"> </text:span><text:span text:style-name="T3">framework</text:span><text:span text:style-name="T12"> </text:span><text:span text:style-name="T3">iteratively</text:span><text:span text:style-name="T12"> </text:span><text:span text:style-name="T3">refines</text:span><text:span text:style-name="T12"> </text:span><text:span text:style-name="T3">its</text:span><text:span text:style-name="T12"> </text:span><text:span text:style-name="T3">Q-table,</text:span><text:span text:style-name="T12"> </text:span><text:span text:style-name="T3">continuously</text:span><text:span text:style-name="T11"> </text:span><text:span text:style-name="T3">improving its testing strategies based on accumulated experience until convergence is achieved.</text:span></text:p>
        <text:p text:style-name="P88" loext:marker-style-name="T3"/>
        <text:p text:style-name="P92" loext:marker-style-name="T3"/>
        <text:p text:style-name="P52" loext:marker-style-name="T61"><text:span text:style-name="T66">REFERENCES</text:span><text:span text:style-name="T66"/></text:p>
        <text:list text:style-name="WWNum6">
          <text:list-item>
            <text:p text:style-name="P21" loext:marker-style-name="T61"><text:span text:style-name="T61">OWASP</text:span><text:span text:style-name="T67"> </text:span><text:span text:style-name="T61">Foundation,</text:span><text:span text:style-name="T67"> </text:span><text:span text:style-name="T61">“Owasp</text:span><text:span text:style-name="T67"> </text:span><text:span text:style-name="T61">top</text:span><text:span text:style-name="T67"> </text:span><text:span text:style-name="T61">10</text:span><text:span text:style-name="T67"> </text:span><text:span text:style-name="T61">-</text:span><text:span text:style-name="T67"> </text:span><text:span text:style-name="T61">2021:</text:span><text:span text:style-name="T67"> </text:span><text:span text:style-name="T61">The</text:span><text:span text:style-name="T67"> </text:span><text:span text:style-name="T61">ten</text:span><text:span text:style-name="T67"> </text:span><text:span text:style-name="T61">most</text:span><text:span text:style-name="T67"> </text:span><text:span text:style-name="T61">critical</text:span><text:span text:style-name="T67"> </text:span><text:span text:style-name="T61">web</text:span><text:span text:style-name="T63"> </text:span><text:span text:style-name="T102">Avail</text:span><text:a xlink:type="simple" xlink:href="https://owasp.org/Top10/" text:style-name="ListLabel_20_69" text:visited-style-name="ListLabel_20_69"><text:span text:style-name="T66">ap</text:span></text:a><text:span text:style-name="T102">b</text:span><text:a xlink:type="simple" xlink:href="https://owasp.org/Top10/" text:style-name="ListLabel_20_69" text:visited-style-name="ListLabel_20_69"><text:span text:style-name="T66">p</text:span></text:a><text:span text:style-name="T102">le</text:span><text:a xlink:type="simple" xlink:href="https://owasp.org/Top10/" text:style-name="ListLabel_20_69" text:visited-style-name="ListLabel_20_69"><text:span text:style-name="T66">l</text:span></text:a><text:span text:style-name="T102">:</text:span><text:a xlink:type="simple" xlink:href="https://owasp.org/Top10/" text:style-name="ListLabel_20_69" text:visited-style-name="ListLabel_20_69"><text:span text:style-name="T66">ication</text:span></text:a><text:span text:style-name="T61"><text:tab/></text:span><text:a xlink:type="simple" xlink:href="https://owasp.org/Top10/" text:style-name="ListLabel_20_69" text:visited-style-name="ListLabel_20_69"><text:span text:style-name="T66">security</text:span></text:a><text:span text:style-name="T61"><text:tab/></text:span><text:span text:style-name="T66">risks,”</text:span><text:span text:style-name="T61"><text:tab/></text:span><text:span text:style-name="T66">2021.</text:span><text:span text:style-name="T61"><text:tab/></text:span><text:span text:style-name="T66">[Online].</text:span></text:p>
          </text:list-item>
        </text:list>
        <text:p text:style-name="P82" loext:marker-style-name="T61"><text:a xlink:type="simple" xlink:href="https://owasp.org/Top10/" text:style-name="ListLabel_20_69" text:visited-style-name="ListLabel_20_69"><text:span text:style-name="T66">https://owasp.org/Top10/</text:span></text:a></text:p>
        <text:list text:continue-numbering="true" text:style-name="WWNum6">
          <text:list-item>
            <text:p text:style-name="P26" loext:marker-style-name="T61"><text:span text:style-name="T61">A.</text:span><text:span text:style-name="T68"> </text:span><text:span text:style-name="T61">Doupe´,</text:span><text:span text:style-name="T68"> </text:span><text:span text:style-name="T61">M.</text:span><text:span text:style-name="T68"> </text:span><text:span text:style-name="T61">Cova,</text:span><text:span text:style-name="T68"> </text:span><text:span text:style-name="T61">and</text:span><text:span text:style-name="T68"> </text:span><text:span text:style-name="T61">G.</text:span><text:span text:style-name="T68"> </text:span><text:span text:style-name="T61">Vigna,</text:span><text:span text:style-name="T68"> </text:span><text:span text:style-name="T61">“Why</text:span><text:span text:style-name="T68"> </text:span><text:span text:style-name="T61">johnny</text:span><text:span text:style-name="T68"> </text:span><text:span text:style-name="T61">can’t</text:span><text:span text:style-name="T68"> </text:span><text:span text:style-name="T61">pentest:</text:span><text:span text:style-name="T68"> </text:span><text:span text:style-name="T61">An</text:span><text:span text:style-name="T63"> </text:span><text:span text:style-name="T61">analysis of black-box web vulnerability scanners,” in Proc. Int. Conf.</text:span><text:span text:style-name="T63"> </text:span><text:span text:style-name="T61">Detection of Intrusions and Malware, and Vulnerability Assessment,</text:span></text:p>
          </text:list-item>
        </text:list>
        <text:p text:style-name="P83" loext:marker-style-name="T61"><text:span text:style-name="T61">2012,</text:span><text:span text:style-name="T67"> </text:span><text:span text:style-name="T61">pp.</text:span><text:span text:style-name="T67"> </text:span><text:span text:style-name="T66">111–131.</text:span></text:p>
        <text:list text:continue-numbering="true" text:style-name="WWNum6">
          <text:list-item>
            <text:p text:style-name="P27" loext:marker-style-name="T61"><text:span text:style-name="T61">Z.</text:span><text:span text:style-name="T69"> </text:span><text:span text:style-name="T61">Guan,</text:span><text:span text:style-name="T69"> </text:span><text:span text:style-name="T61">Z.</text:span><text:span text:style-name="T69"> </text:span><text:span text:style-name="T61">Bian,</text:span><text:span text:style-name="T69"> </text:span><text:span text:style-name="T61">Y.</text:span><text:span text:style-name="T69"> </text:span><text:span text:style-name="T61">Wang,</text:span><text:span text:style-name="T69"> </text:span><text:span text:style-name="T61">X.</text:span><text:span text:style-name="T69"> </text:span><text:span text:style-name="T61">Wang,</text:span><text:span text:style-name="T69"> </text:span><text:span text:style-name="T61">and</text:span><text:span text:style-name="T69"> </text:span><text:span text:style-name="T61">L.</text:span><text:span text:style-name="T69"> </text:span><text:span text:style-name="T61">Wang,</text:span><text:span text:style-name="T69"> </text:span><text:span text:style-name="T61">“Ssqli:</text:span><text:span text:style-name="T69"> </text:span><text:span text:style-name="T61">A</text:span><text:span text:style-name="T69"> </text:span><text:span text:style-name="T61">black-</text:span><text:span text:style-name="T63"> </text:span><text:span text:style-name="T61">box adversarial attack method for sql injection based on reinforcement</text:span><text:span text:style-name="T63"> </text:span><text:span text:style-name="T61">learning,” Computers &amp; Security, vol. 131, p. 103289, 2023.</text:span></text:p>
          </text:list-item>
          <text:list-item>
            <text:p text:style-name="P28" loext:marker-style-name="T61"><text:span text:style-name="T61">K.</text:span><text:span text:style-name="T64"> </text:span><text:span text:style-name="T61">Leung,</text:span><text:span text:style-name="T64"> </text:span><text:span text:style-name="T61">Z.</text:span><text:span text:style-name="T64"> </text:span><text:span text:style-name="T61">Chen,</text:span><text:span text:style-name="T64"> </text:span><text:span text:style-name="T61">Y.</text:span><text:span text:style-name="T64"> </text:span><text:span text:style-name="T61">Zhang,</text:span><text:span text:style-name="T64"> </text:span><text:span text:style-name="T61">and</text:span><text:span text:style-name="T64"> </text:span><text:span text:style-name="T61">J.</text:span><text:span text:style-name="T64"> </text:span><text:span text:style-name="T61">Wang,</text:span><text:span text:style-name="T64"> </text:span><text:span text:style-name="T61">“Xploitsql:</text:span><text:span text:style-name="T64"> </text:span><text:span text:style-name="T61">Advancing</text:span><text:span text:style-name="T63"> </text:span><text:span text:style-name="T61">adversarial sql injection attack,” in Proc. Int. Conf. Security and</text:span><text:span text:style-name="T63"> </text:span><text:span text:style-name="T61">Privacy, 2024, pp. 245–260.</text:span></text:p>
          </text:list-item>
          <text:list-item>
            <text:p text:style-name="P30" loext:marker-style-name="T61"><text:span text:style-name="T61">Y. Li, H. Zhang, X. Wang, L. Chen, and M. Liu, “Eppta: Efficient</text:span><text:span text:style-name="T63"> </text:span><text:span text:style-name="T61">partially observable reinforcement learning agent for penetration</text:span><text:span text:style-name="T63"> </text:span><text:span text:style-name="T61">testing</text:span><text:span text:style-name="T62"> </text:span><text:span text:style-name="T61">applications,”</text:span><text:span text:style-name="T62"> </text:span><text:span text:style-name="T61">IEEE</text:span><text:span text:style-name="T62"> </text:span><text:span text:style-name="T61">Trans.</text:span><text:span text:style-name="T62"> </text:span><text:span text:style-name="T61">Information</text:span><text:span text:style-name="T62"> </text:span><text:span text:style-name="T61">Forensics</text:span><text:span text:style-name="T62"> </text:span><text:span text:style-name="T61">and</text:span><text:span text:style-name="T62"> </text:span><text:span text:style-name="T61">Security,</text:span><text:span text:style-name="T63"> </text:span><text:span text:style-name="T61">vol. 20, pp. 1234–1248, 2025.</text:span></text:p>
          </text:list-item>
          <text:list-item>
            <text:p text:style-name="P13" loext:marker-style-name="T61"><text:span text:style-name="T61">B. Damele and M. Stampar, “sqlmap: Automati</text:span><text:a xlink:type="simple" xlink:href="https://sqlmap.org/" text:style-name="ListLabel_20_70" text:visited-style-name="ListLabel_20_70"><text:span text:style-name="T61">c sql injection and</text:span></text:a><text:span text:style-name="T63"> </text:span><text:span text:style-name="T61">database</text:span><text:span text:style-name="T70"> </text:span><text:span text:style-name="T61">takeover</text:span><text:span text:style-name="T70"> </text:span><text:span text:style-name="T61">tool,”</text:span><text:span text:style-name="T70"> </text:span><text:span text:style-name="T61">2009.</text:span><text:span text:style-name="T70"> </text:span><text:span text:style-name="T61">[Online].</text:span><text:span text:style-name="T70"> </text:span><text:span text:style-name="T61">Available</text:span><text:a xlink:type="simple" xlink:href="https://sqlmap.org/" text:style-name="ListLabel_20_70" text:visited-style-name="ListLabel_20_70"><text:span text:style-name="T61">:</text:span><text:span text:style-name="T70"> </text:span><text:span text:style-name="T61">https://sqlmap.org</text:span></text:a></text:p>
          </text:list-item>
          <text:list-item>
            <text:p text:style-name="P31" loext:marker-style-name="T61"><text:span text:style-name="T61">M.</text:span><text:span text:style-name="T69"> </text:span><text:span text:style-name="T61">Alghawazi,</text:span><text:span text:style-name="T69"> </text:span><text:span text:style-name="T61">D.</text:span><text:span text:style-name="T69"> </text:span><text:span text:style-name="T61">Alghazzawi,</text:span><text:span text:style-name="T69"> </text:span><text:span text:style-name="T61">S.</text:span><text:span text:style-name="T69"> </text:span><text:span text:style-name="T61">Alarifi,</text:span><text:span text:style-name="T69"> </text:span><text:span text:style-name="T61">R.</text:span><text:span text:style-name="T69"> </text:span><text:span text:style-name="T61">Alharthi,</text:span><text:span text:style-name="T69"> </text:span><text:span text:style-name="T61">and</text:span><text:span text:style-name="T69"> </text:span><text:span text:style-name="T61">A.</text:span><text:span text:style-name="T69"> </text:span><text:span text:style-name="T61">Alharbi,</text:span><text:span text:style-name="T63"> </text:span><text:span text:style-name="T61">“Detection of sql injection attack using machine learning techniques:</text:span></text:p>
          </text:list-item>
        </text:list>
        <text:p text:style-name="P84" loext:marker-style-name="T61"><text:span text:style-name="T61">A</text:span><text:span text:style-name="T71"> </text:span><text:span text:style-name="T61">systematic</text:span><text:span text:style-name="T72"> </text:span><text:span text:style-name="T61">literature</text:span><text:span text:style-name="T72"> </text:span><text:span text:style-name="T61">review,”</text:span><text:span text:style-name="T72"> </text:span><text:span text:style-name="T61">J.</text:span><text:span text:style-name="T71"> </text:span><text:span text:style-name="T61">Cybersecurity</text:span><text:span text:style-name="T72"> </text:span><text:span text:style-name="T61">and</text:span><text:span text:style-name="T72"> </text:span><text:span text:style-name="T61">Privacy,</text:span><text:span text:style-name="T72"> </text:span><text:span text:style-name="T61">vol.</text:span><text:span text:style-name="T71"> </text:span><text:span text:style-name="T64">2,</text:span></text:p>
        <text:p text:style-name="P85" loext:marker-style-name="T61"><text:span text:style-name="T61">no.</text:span><text:span text:style-name="T67"> </text:span><text:span text:style-name="T61">4,</text:span><text:span text:style-name="T67"> </text:span><text:span text:style-name="T61">pp.</text:span><text:span text:style-name="T67"> </text:span><text:span text:style-name="T61">764–777,</text:span><text:span text:style-name="T67"> </text:span><text:span text:style-name="T66">2022.</text:span></text:p>
        <text:list text:continue-numbering="true" text:style-name="WWNum6">
          <text:list-item>
            <text:p text:style-name="P32" loext:marker-style-name="T61"><text:span text:style-name="T61">B.</text:span><text:span text:style-name="T73"> </text:span><text:span text:style-name="T61">Chess</text:span><text:span text:style-name="T73"> </text:span><text:span text:style-name="T61">and</text:span><text:span text:style-name="T73"> </text:span><text:span text:style-name="T61">J.</text:span><text:span text:style-name="T73"> </text:span><text:span text:style-name="T61">West,</text:span><text:span text:style-name="T73"> </text:span><text:span text:style-name="T61">Secure</text:span><text:span text:style-name="T73"> </text:span><text:span text:style-name="T61">Programming</text:span><text:span text:style-name="T73"> </text:span><text:span text:style-name="T61">with</text:span><text:span text:style-name="T73"> </text:span><text:span text:style-name="T61">Static</text:span><text:span text:style-name="T73"> </text:span><text:span text:style-name="T61">Analysis.</text:span><text:span text:style-name="T63"> </text:span><text:span text:style-name="T61">Addison-Wesley Professional, 2007.</text:span></text:p>
          </text:list-item>
        </text:list>
      </text:section>
      <text:section text:style-name="Sect8" text:name="Section9">
        <text:list xml:id="list154115624543061" text:continue-numbering="true" text:style-name="WWNum6">
          <text:list-item>
            <text:list>
              <text:list-item>
                <text:p text:style-name="P34" loext:marker-style-name="T3"><text:span text:style-name="T3">Training Dataset</text:span><text:span text:style-name="T9">: </text:span><text:span text:style-name="T3">A curated collection of 60,000 labeled</text:span><text:span text:style-name="T7"> </text:span><text:span text:style-name="T3">SQLi</text:span><text:span text:style-name="T7"> </text:span><text:span text:style-name="T3">examples</text:span><text:span text:style-name="T7"> </text:span><text:span text:style-name="T3">sourced</text:span><text:span text:style-name="T7"> </text:span><text:span text:style-name="T3">from</text:span><text:span text:style-name="T7"> </text:span><text:span text:style-name="T3">SSQLi</text:span><text:span text:style-name="T7"> </text:span><text:span text:style-name="T3">and</text:span></text:p>
              </text:list-item>
            </text:list>
          </text:list-item>
          <text:list-item>
            <text:p text:style-name="P33" loext:marker-style-name="T61"/>
          </text:list-item>
        </text:list>
        <text:p text:style-name="P53" loext:marker-style-name="T61"><text:span text:style-name="T61">T.</text:span><text:span text:style-name="T69"> </text:span><text:span text:style-name="T61">T.</text:span><text:span text:style-name="T67"> </text:span><text:span text:style-name="T61">Nguyen</text:span><text:span text:style-name="T69"> </text:span><text:span text:style-name="T61">and</text:span><text:span text:style-name="T67"> </text:span><text:span text:style-name="T61">V.</text:span><text:span text:style-name="T67"> </text:span><text:span text:style-name="T61">J.</text:span><text:span text:style-name="T69"> </text:span><text:span text:style-name="T61">Reddi,</text:span><text:span text:style-name="T67"> </text:span><text:span text:style-name="T61">“Deep</text:span><text:span text:style-name="T67"> </text:span><text:span text:style-name="T61">reinforcement</text:span><text:span text:style-name="T69"> </text:span><text:span text:style-name="T61">learning</text:span><text:span text:style-name="T67"> </text:span><text:span text:style-name="T61">for</text:span><text:span text:style-name="T69"> </text:span><text:span text:style-name="T66">cyber</text:span></text:p>
        <text:p text:style-name="P39" loext:marker-style-name="T61"><text:span text:style-name="T61">security,” IEEE Trans. Neural Networks and Learning Systems, vol.</text:span><text:span text:style-name="T63"> </text:span><text:span text:style-name="T61">32, no. 8, pp. 3779–3795, 2021.</text:span></text:p>
      </text:section>
      <text:section text:style-name="Sect9" text:name="Section10">
        <text:p text:style-name="P74" loext:marker-style-name="T3"><text:span text:style-name="T3">XPLOITSQL</text:span><text:span text:style-name="T7"> </text:span><text:span text:style-name="T3">datasets,</text:span><text:span text:style-name="T7"> </text:span><text:span text:style-name="T3">augmented</text:span><text:span text:style-name="T7"> </text:span><text:span text:style-name="T3">with</text:span><text:span text:style-name="T7"> </text:span><text:span text:style-name="T3">custom payloads for modern frameworks.</text:span></text:p>
        <text:list text:style-name="WWNum7">
          <text:list-item>
            <text:p text:style-name="P35" loext:marker-style-name="T3"><text:span text:style-name="T3">Prompt Engineering</text:span><text:span text:style-name="T9">: </text:span><text:span text:style-name="T3">Structured prompts that incorporate environmental context, such as target syntax and WAF presence, ensuring the model generates</text:span><text:span text:style-name="T7"> </text:span><text:span text:style-name="T3">valid,</text:span><text:span text:style-name="T7"> </text:span><text:span text:style-name="T3">implementation-ready</text:span><text:span text:style-name="T7"> </text:span><text:span text:style-name="T3">payloads</text:span><text:span text:style-name="T7"> </text:span><text:span text:style-name="T3">for the specified strategy.</text:span></text:p>
          </text:list-item>
        </text:list>
        <text:list text:continue-list="list154115624543061" text:style-name="WWNum6">
          <text:list-item>
            <text:p text:style-name="P22" loext:marker-style-name="T61"><text:span text:style-name="T61">R.</text:span><text:span text:style-name="T64"> </text:span><text:span text:style-name="T61">S.</text:span><text:span text:style-name="T64"> </text:span><text:span text:style-name="T61">Sutton</text:span><text:span text:style-name="T64"> </text:span><text:span text:style-name="T61">and</text:span><text:span text:style-name="T64"> </text:span><text:span text:style-name="T61">A.</text:span><text:span text:style-name="T64"> </text:span><text:span text:style-name="T61">G.</text:span><text:span text:style-name="T64"> </text:span><text:span text:style-name="T61">Barto,</text:span><text:span text:style-name="T64"> </text:span><text:span text:style-name="T61">Reinforcement</text:span><text:span text:style-name="T64"> </text:span><text:span text:style-name="T61">Learning:</text:span><text:span text:style-name="T64"> </text:span><text:span text:style-name="T61">An</text:span><text:span text:style-name="T63"> </text:span><text:span text:style-name="T61">Introduction, 2nd ed. MIT Press, 2018.</text:span></text:p>
          </text:list-item>
          <text:list-item>
            <text:p text:style-name="P29" loext:marker-style-name="T61"><text:span text:style-name="T61">T. B. Brown et al., “Language models are few-shot learners,” in</text:span><text:span text:style-name="T63"> </text:span><text:span text:style-name="T61">Advances</text:span><text:span text:style-name="T65"> </text:span><text:span text:style-name="T61">in</text:span><text:span text:style-name="T65"> </text:span><text:span text:style-name="T61">Neural</text:span><text:span text:style-name="T65"> </text:span><text:span text:style-name="T61">Information</text:span><text:span text:style-name="T65"> </text:span><text:span text:style-name="T61">Processing</text:span><text:span text:style-name="T65"> </text:span><text:span text:style-name="T61">Systems,</text:span><text:span text:style-name="T65"> </text:span><text:span text:style-name="T61">vol.</text:span><text:span text:style-name="T65"> </text:span><text:span text:style-name="T61">33,</text:span><text:span text:style-name="T65"> </text:span><text:span text:style-name="T61">2020,</text:span><text:span text:style-name="T65"> </text:span><text:span text:style-name="T61">pp.</text:span><text:span text:style-name="T63"> </text:span><text:span text:style-name="T66">1877–1891.</text:span></text:p>
          </text:list-item>
          <text:list-item>
            <text:p text:style-name="P36" loext:marker-style-name="T61"><text:span text:style-name="T61">E.</text:span><text:span text:style-name="T69"> </text:span><text:span text:style-name="T61">J.</text:span><text:span text:style-name="T69"> </text:span><text:span text:style-name="T61">Hu</text:span><text:span text:style-name="T69"> </text:span><text:span text:style-name="T61">et</text:span><text:span text:style-name="T69"> </text:span><text:span text:style-name="T61">al.,</text:span><text:span text:style-name="T69"> </text:span><text:span text:style-name="T61">“Lora:</text:span><text:span text:style-name="T69"> </text:span><text:span text:style-name="T61">Low-rank</text:span><text:span text:style-name="T69"> </text:span><text:span text:style-name="T61">adaptation</text:span><text:span text:style-name="T69"> </text:span><text:span text:style-name="T61">of</text:span><text:span text:style-name="T69"> </text:span><text:span text:style-name="T61">large</text:span><text:span text:style-name="T69"> </text:span><text:span text:style-name="T61">language</text:span><text:span text:style-name="T69"> </text:span><text:span text:style-name="T61">models,”</text:span><text:span text:style-name="T63"> </text:span><text:span text:style-name="T61">arXiv preprint arXiv:2106.09685, 2021.</text:span></text:p>
          </text:list-item>
          <text:list-item>
            <text:p text:style-name="P23" loext:marker-style-name="T61"><text:span text:style-name="T61">sqlmap development t</text:span><text:a xlink:type="simple" xlink:href="https://sqlmap.org/" text:style-name="ListLabel_20_70" text:visited-style-name="ListLabel_20_70"><text:span text:style-name="T61">eam, “sqlmap: Aut</text:span></text:a><text:span text:style-name="T61">omatic sql injection and</text:span><text:span text:style-name="T63"> </text:span><text:span text:style-name="T61">database</text:span><text:span text:style-name="T62"> </text:span><text:span text:style-name="T61">takeover</text:span><text:span text:style-name="T62"> </text:span><text:span text:style-name="T61">tool,</text:span><text:a xlink:type="simple" xlink:href="https://sqlmap.org/" text:style-name="ListLabel_20_70" text:visited-style-name="ListLabel_20_70"><text:span text:style-name="T61">”</text:span><text:span text:style-name="T62"> </text:span><text:span text:style-name="T61">https://sqlmap.org,</text:span><text:span text:style-name="T62"> </text:span><text:span text:style-name="T61">2</text:span></text:a><text:span text:style-name="T61">024,</text:span><text:span text:style-name="T62"> </text:span><text:span text:style-name="T61">accessed:</text:span><text:span text:style-name="T62"> </text:span><text:span text:style-name="T61">2025-01.</text:span></text:p>
          </text:list-item>
        </text:list>
      </text:section>
      <text:section text:style-name="Sect1" text:name="Section11">
        <text:p text:style-name="P94" loext:marker-style-name="T3"/>
        <text:p text:style-name="P80" loext:marker-style-name="T3"><text:span text:style-name="T3">Multi-Tiered Analysis and Reward Logic Following the execution of the attack, the Analysis Layer employs Qwen2.5- tChoeder-14B</text:span><text:span text:style-name="T12"> </text:span><text:span text:style-name="T3">to</text:span><text:span text:style-name="T12"> </text:span><text:span text:style-name="T3">interpret</text:span><text:span text:style-name="T12"> </text:span><text:span text:style-name="T3">the</text:span><text:span text:style-name="T12"> </text:span><text:span text:style-name="T3">results.</text:span><text:span text:style-name="T12"> </text:span><text:span text:style-name="T3">Recognizing computational cost of a 14B model, the architecture utilizes it selectively for batch analysis rather than individual payloads. This "selective intelligence" facilitates deep semantic tasks such as response classification, severity assessment, and remediation documentation.</text:span></text:p>
        <text:p text:style-name="P86" loext:marker-style-name="T3"><text:span text:style-name="T3">Finally</text:span><text:span text:style-name="T15"> </text:span><text:span text:style-name="T3">the</text:span><text:span text:style-name="T15"> </text:span><text:span text:style-name="T3">framework’s</text:span><text:span text:style-name="T15"> </text:span><text:span text:style-name="T3">learning</text:span><text:span text:style-name="T15"> </text:span><text:span text:style-name="T3">is</text:span><text:span text:style-name="T15"> </text:span><text:span text:style-name="T3">governed</text:span><text:span text:style-name="T15"> </text:span><text:span text:style-name="T3">by</text:span><text:span text:style-name="T15"> </text:span><text:span text:style-name="T3">a multi-objective reward function:</text:span></text:p>
        <text:p text:style-name="P62" loext:marker-style-name="T3"><text:span text:style-name="T3">R(s,</text:span><text:span text:style-name="T7"> </text:span><text:span text:style-name="T3">a,</text:span><text:span text:style-name="T15"> </text:span><text:span text:style-name="T3">s)</text:span><text:span text:style-name="T7"> </text:span><text:span text:style-name="T3">=</text:span><text:span text:style-name="T15"> </text:span><text:span text:style-name="T3">α·V</text:span><text:span text:style-name="T15"> </text:span><text:span text:style-name="T7">DR(a)+β·ESR(a)−γ·FPR(a)−δ·Time(a)</text:span></text:p>
        <text:p text:style-name="P95" loext:marker-style-name="T3"/>
        <text:p text:style-name="P87" loext:marker-style-name="T3"><text:span text:style-name="T3">where α =</text:span><text:span text:style-name="T21"> </text:span><text:span text:style-name="T3">0.6 represents the</text:span><text:span text:style-name="T21"> </text:span><text:span text:style-name="T3">detection effectiveness weight,</text:span><text:span text:style-name="T21"> </text:span><text:span text:style-name="T22">β</text:span></text:p>
        <text:p text:style-name="P81" loext:marker-style-name="T3"><text:span text:style-name="T3">= 0.3 denotes the ethical compliance weight, γ = 0.1 corresponds to the false positive penalty, and δ = 0.05 is the time penalty coefficient.</text:span><text:span text:style-name="T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Sans Serif" svg:font-family="'Microsoft Sans Serif'" style:font-family-generic="swiss"/>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1382in"/>
      <style:text-properties style:font-name="Times New Roman1" fo:font-family="'Times New Roman'" style:font-family-generic="roman" style:font-pitch="variable" fo:font-size="9.5pt" fo:language="en" fo:country="US" style:font-name-asian="Times New Roman2" style:font-family-asian="'Times New Roman'" style:font-family-generic-asian="system" style:font-pitch-asian="variable" style:font-size-asian="9.5pt" style:language-asian="en" style:country-asian="US" style:font-name-complex="Times New Roman2" style:font-family-complex="'Times New Roman'" style:font-family-generic-complex="system" style:font-pitch-complex="variable" style:font-size-complex="9.5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2925in" fo:text-indent="-0.1543in" style:auto-text-indent="false"/>
      <style:text-properties style:font-name="Times New Roman1" fo:font-family="'Times New Roman'" style:font-family-generic="roman" style:font-pitch="variable" fo:font-size="10pt" fo:language="en" fo:country="US" fo:font-style="italic" style:font-name-asian="Times New Roman2" style:font-family-asian="'Times New Roman'" style:font-family-generic-asian="system" style:font-pitch-asian="variable" style:font-size-asian="10pt" style:language-asian="en" style:country-asian="US" style:font-style-asian="italic" style:font-name-complex="Times New Roman2" style:font-family-complex="'Times New Roman'" style:font-family-generic-complex="system" style:font-pitch-complex="variable" style:font-size-complex="10pt" style:language-complex="ar" style:country-complex="SA" style:font-style-complex="italic"/>
    </style:style>
    <style:style style:name="Title" style:family="paragraph" style:parent-style-name="Standard" style:class="chapter">
      <style:paragraph-properties fo:margin-right="0.089in" fo:margin-top="0.048in" fo:margin-bottom="0in" style:contextual-spacing="false"/>
      <style:text-properties style:font-name="Times New Roman1" fo:font-family="'Times New Roman'" style:font-family-generic="roman" style:font-pitch="variable" fo:font-size="24pt" fo:language="en" fo:country="US" style:font-name-asian="Times New Roman2" style:font-family-asian="'Times New Roman'" style:font-family-generic-asian="system" style:font-pitch-asian="variable" style:font-size-asian="24pt" style:language-asian="en" style:country-asian="US" style:font-name-complex="Times New Roman2" style:font-family-complex="'Times New Roman'" style:font-family-generic-complex="system" style:font-pitch-complex="variable" style:font-size-complex="24pt" style:language-complex="ar" style:country-complex="SA"/>
    </style:style>
    <style:style style:name="List_20_Paragraph" style:display-name="List Paragraph" style:family="paragraph" style:parent-style-name="Standard">
      <style:paragraph-properties fo:margin-left="0.1382in"/>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font-size="10pt" fo:letter-spacing="normal" fo:language="en" fo:country="US" fo:font-style="normal" fo:font-weight="normal" style:font-name-asian="Microsoft Sans Serif1" style:font-family-asian="'Microsoft Sans Serif'" style:font-family-generic-asian="system" style:font-pitch-asian="variable" style:font-size-asian="10pt" style:language-asian="en" style:country-asian="US" style:font-style-asian="normal" style:font-weight-asian="normal" style:font-name-complex="Microsoft Sans Serif1" style:font-family-complex="'Microsoft Sans Serif'"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1" fo:font-family="'Times New Roman'" style:font-family-generic="roman" style:font-pitch="variable" fo:font-size="8pt" fo:letter-spacing="normal" fo:language="en" fo:country="US" fo:font-style="normal" fo:font-weight="normal" style:font-name-asian="Times New Roman2" style:font-family-asian="'Times New Roman'"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ar" style:country-complex="SA" style:font-style-complex="normal" style:font-weight-complex="normal" style:text-scale="98%"/>
    </style:style>
    <style:style style:name="ListLabel_20_11" style:display-name="ListLabel 11" style:family="text">
      <style:text-properties fo:font-size="10pt" fo:letter-spacing="normal" fo:language="en" fo:country="US" fo:font-style="normal" fo:font-weight="normal" style:font-name-asian="Microsoft Sans Serif1" style:font-family-asian="'Microsoft Sans Serif'" style:font-family-generic-asian="system" style:font-pitch-asian="variable" style:font-size-asian="10pt" style:language-asian="en" style:country-asian="US" style:font-style-asian="normal" style:font-weight-asian="normal" style:font-name-complex="Microsoft Sans Serif1" style:font-family-complex="'Microsoft Sans Serif'"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0pt" fo:letter-spacing="normal" fo:language="en" fo:country="US" fo:font-style="normal" fo:font-weight="normal" style:font-name-asian="Microsoft Sans Serif1" style:font-family-asian="'Microsoft Sans Serif'" style:font-family-generic-asian="system" style:font-pitch-asian="variable" style:font-size-asian="10pt" style:language-asian="en" style:country-asian="US" style:font-style-asian="normal" style:font-weight-asian="normal" style:font-name-complex="Microsoft Sans Serif1" style:font-family-complex="'Microsoft Sans Serif'" style:font-family-generic-complex="system" style:font-pitch-complex="variable" style:font-size-complex="10pt" style:language-complex="ar" style:country-complex="SA" style:font-style-complex="normal"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9.5pt" fo:letter-spacing="normal" fo:language="en" fo:country="US" fo:font-style="normal" fo:font-weight="normal" style:font-name-asian="Times New Roman2" style:font-family-asian="'Times New Roman'" style:font-family-generic-asian="system" style:font-pitch-asian="variable" style:font-size-asian="9.5pt" style:language-asian="en" style:country-asian="US" style:font-style-asian="normal" style:font-weight-asian="normal" style:font-name-complex="Times New Roman2" style:font-family-complex="'Times New Roman'" style:font-family-generic-complex="system" style:font-pitch-complex="variable" style:font-size-complex="9.5pt" style:language-complex="ar" style:country-complex="SA" style:font-style-complex="normal" style:font-weight-complex="normal" style:text-scale="101%"/>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1" fo:font-family="'Times New Roman'" style:font-family-generic="roman" style:font-pitch="variable" fo:font-size="10pt" fo:letter-spacing="-0.0008in" fo:language="en" fo:country="US" fo:font-style="italic" fo:font-weight="normal" style:font-name-asian="Times New Roman2" style:font-family-asian="'Times New Roman'" style:font-family-generic-asian="system" style:font-pitch-asian="variable" style:font-size-asian="10pt" style:language-asian="en" style:country-asian="US" style:font-style-asian="italic" style:font-weight-asian="normal" style:font-name-complex="Times New Roman2" style:font-family-complex="'Times New Roman'" style:font-family-generic-complex="system" style:font-pitch-complex="variable" style:font-size-complex="10pt" style:language-complex="ar" style:country-complex="SA" style:font-style-complex="italic" style:font-weight-complex="normal"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etter-spacing="normal" fo:language="en" fo:country="US" style:language-asian="en" style:country-asian="US" style:language-complex="ar" style:country-complex="SA" style:text-scale="101%"/>
    </style:style>
    <style:style style:name="ListLabel_20_47" style:display-name="ListLabel 47" style:family="text">
      <style:text-properties fo:font-size="9.5pt" fo:letter-spacing="normal" fo:language="en" fo:country="US" fo:font-style="normal" fo:font-weight="normal" style:font-name-asian="Times New Roman2" style:font-family-asian="'Times New Roman'" style:font-family-generic-asian="system" style:font-pitch-asian="variable" style:font-size-asian="9.5pt" style:language-asian="en" style:country-asian="US" style:font-style-asian="normal" style:font-weight-asian="normal" style:font-name-complex="Times New Roman2" style:font-family-complex="'Times New Roman'" style:font-family-generic-complex="system" style:font-pitch-complex="variable" style:font-size-complex="9.5pt" style:language-complex="ar" style:country-complex="SA" style:font-style-complex="normal" style:font-weight-complex="normal" style:text-scale="101%"/>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etter-spacing="-0.0008in" fo:language="en" fo:country="US" style:language-asian="en" style:country-asian="US" style:language-complex="ar" style:country-complex="SA" style:text-scale="100%"/>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style:text-position="0% 100%" fo:font-size="9pt" fo:letter-spacing="-0.0016in"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65" style:display-name="ListLabel 65" style:family="text">
      <style:text-properties fo:font-size="9pt" fo:letter-spacing="-0.0016in" style:font-size-asian="9pt"/>
    </style:style>
    <style:style style:name="ListLabel_20_66" style:display-name="ListLabel 66" style:family="text">
      <style:text-properties fo:font-size="7.5pt" style:font-size-asian="7.5pt"/>
    </style:style>
    <style:style style:name="ListLabel_20_67" style:display-name="ListLabel 67" style:family="text">
      <style:text-properties fo:font-size="7.5pt" fo:letter-spacing="-0.002in" style:font-size-asian="7.5pt"/>
    </style:style>
    <style:style style:name="ListLabel_20_68" style:display-name="ListLabel 68" style:family="text">
      <style:text-properties fo:font-size="7.5pt" fo:letter-spacing="-0.0016in" style:font-size-asian="7.5pt"/>
    </style:style>
    <style:style style:name="ListLabel_20_69" style:display-name="ListLabel 69" style:family="text">
      <style:text-properties fo:font-size="8pt" fo:letter-spacing="-0.0016in" style:font-size-asian="8pt"/>
    </style:style>
    <style:style style:name="ListLabel_20_70" style:display-name="ListLabel 70" style:family="text">
      <style:text-properties fo:font-size="8pt" style:font-size-asian="8pt"/>
    </style:style>
    <style:style style:name="ListLabel_20_71" style:display-name="ListLabel 71" style:family="text">
      <style:text-properties fo:font-size="8pt" fo:letter-spacing="-0.0047in" style:font-size-asian="8pt"/>
    </style:style>
    <style:style style:name="ListLabel_20_72" style:display-name="ListLabel 72" style:family="text">
      <style:text-properties fo:font-size="8pt" fo:letter-spacing="-0.0055in"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loext:num-list-format="●" style:num-suffix="●" text:bullet-char="●">
        <style:list-level-properties text:list-level-position-and-space-mode="label-alignment">
          <style:list-level-label-alignment text:label-followed-by="listtab" fo:text-indent="-0.2508in" fo:margin-left="0.6382in"/>
        </style:list-level-properties>
        <style:text-properties fo:font-family="'Microsoft Sans Serif'"/>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08in" fo:margin-left="0.9264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08in" fo:margin-left="1.214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08in" fo:margin-left="1.5028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08in" fo:margin-left="1.7909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08in" fo:margin-left="2.0791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08in" fo:margin-left="2.3673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08in" fo:margin-left="2.655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08in" fo:margin-left="2.942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 loext:num-list-format="[%1%]" style:num-prefix="[" style:num-suffix="]" style:num-format="1">
        <style:list-level-properties text:list-level-position-and-space-mode="label-alignment">
          <style:list-level-label-alignment text:label-followed-by="listtab" fo:text-indent="-0.1583in" fo:margin-left="0.1382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08in" fo:margin-left="0.6382in"/>
        </style:list-level-properties>
        <style:text-properties fo:font-family="'Microsoft Sans Serif'"/>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08in" fo:margin-left="0.539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08in" fo:margin-left="0.4398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08in" fo:margin-left="0.3402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08in" fo:margin-left="0.2409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08in" fo:margin-left="0.1417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08in" fo:margin-left="0.042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08in" fo:margin-left="-0.057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loext:num-list-format="●" style:num-suffix="●" text:bullet-char="●">
        <style:list-level-properties text:list-level-position-and-space-mode="label-alignment">
          <style:list-level-label-alignment text:label-followed-by="listtab" fo:text-indent="-0.2508in" fo:margin-left="0.6382in"/>
        </style:list-level-properties>
        <style:text-properties fo:font-family="'Microsoft Sans Serif'"/>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08in" fo:margin-left="0.9299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08in" fo:margin-left="1.2217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08in" fo:margin-left="1.5134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08in" fo:margin-left="1.8047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08in" fo:margin-left="2.0957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08in" fo:margin-left="2.3874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08in" fo:margin-left="2.6791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08in" fo:margin-left="2.970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138in" fo:margin-left="0.1382in"/>
        </style:list-level-properties>
        <style:text-properties fo:font-family="'Times New Roman'"/>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138in" fo:margin-left="0.4819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138in" fo:margin-left="0.8256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138in" fo:margin-left="1.1689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138in" fo:margin-left="1.5126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138in" fo:margin-left="1.855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138in" fo:margin-left="2.1992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138in" fo:margin-left="2.542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138in" fo:margin-left="2.8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1555in" fo:margin-left="0.2937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1555in" fo:margin-left="0.6189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555in" fo:margin-left="0.946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555in" fo:margin-left="1.2744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555in" fo:margin-left="1.602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555in" fo:margin-left="1.9299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555in" fo:margin-left="2.257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555in" fo:margin-left="2.585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555in" fo:margin-left="2.913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1402in" fo:margin-left="-3.353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1138in" fo:margin-left="0.1382in"/>
        </style:list-level-properties>
        <style:text-properties fo:font-family="'Times New Roman'"/>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138in" fo:margin-left="0.1146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138in" fo:margin-left="0.090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138in" fo:margin-left="0.066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138in" fo:margin-left="0.0417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138in" fo:margin-left="0.0181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138in" fo:margin-left="-0.0063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138in" fo:margin-left="-0.0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5" loext:num-list-format="%1%." style:num-suffix="." style:num-format="I">
        <style:list-level-properties text:list-level-position-and-space-mode="label-alignment">
          <style:list-level-label-alignment text:label-followed-by="listtab" fo:text-indent="-0.1909in" fo:margin-left="1.4791in"/>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1909in" fo:margin-left="1.692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09in" fo:margin-left="1.8992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09in" fo:margin-left="2.105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09in" fo:margin-left="2.3126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09in" fo:margin-left="2.5189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09in" fo:margin-left="2.7256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09in" fo:margin-left="2.9327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09in" fo:margin-left="3.1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361in" fo:margin-bottom="0.1945in" fo:margin-left="0.4917in" fo:margin-right="0.295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083in" fo:margin-bottom="0.1945in" fo:margin-left="0.4917in" fo:margin-right="0.2953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6945in" fo:margin-bottom="0.1945in" fo:margin-left="0.4917in" fo:margin-right="0.2953in" style:writing-mode="lr-tb" style:layout-grid-color="#c0c0c0" style:layout-grid-lines="274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nsini Medawatta</meta:initial-creator>
    <meta:keyword>DAHEczr_zCQ</meta:keyword>
    <meta:keyword>BAGaes0EERI</meta:keyword>
    <meta:keyword>0</meta:keyword>
    <dc:title>my final.pdf</dc:title>
    <meta:creation-date>2026-03-27T07:45:46</meta:creation-date>
    <dc:date>2026-03-27T07:45:46</dc:date>
    <meta:editing-duration>P0D</meta:editing-duration>
    <meta:generator>LibreOffice/24.2.7.2$Linux_X86_64 LibreOffice_project/420$Build-2</meta:generator>
    <meta:document-statistic meta:table-count="0" meta:image-count="3" meta:object-count="0" meta:page-count="4" meta:paragraph-count="123" meta:word-count="2682" meta:character-count="19571" meta:non-whitespace-character-count="17056"/>
    <meta:user-defined meta:name="AppVersion">12.0000</meta:user-defined>
    <meta:user-defined meta:name="Created" meta:value-type="date">2026-03-20T00:00:00</meta:user-defined>
    <meta:user-defined meta:name="Creator">Canva</meta:user-defined>
    <meta:user-defined meta:name="LastSaved" meta:value-type="date">2026-03-27T00:00:00</meta:user-defined>
    <meta:user-defined meta:name="Producer" meta:value-type="string">Canva</meta:user-defined>
    <meta:template xlink:type="simple" xlink:actuate="onRequest" xlink:title="Normal" xlink:href=""/>
  </office:meta>
</office:document-meta>
</file>